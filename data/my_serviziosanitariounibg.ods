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ittadino">
        <table:table-row>
          <table:table-cell office:value-type="string">
            <text:p>BCCLSS93H07F205O</text:p>
          </table:table-cell>
          <table:table-cell office:value-type="string">
            <text:p>Alessia</text:p>
          </table:table-cell>
          <table:table-cell office:value-type="string">
            <text:p>Boccalini</text:p>
          </table:table-cell>
          <table:table-cell office:value-type="date" office:date-value="1993-08-07" table:style-name="DateCell">
            <text:p>1993-08-07</text:p>
          </table:table-cell>
          <table:table-cell office:value-type="string">
            <text:p>Milano</text:p>
          </table:table-cell>
          <table:table-cell office:value-type="string">
            <text:p>Via Vigevano 3, Milano</text:p>
          </table:table-cell>
        </table:table-row>
        <table:table-row>
          <table:table-cell office:value-type="string">
            <text:p>BNCLRA95G17D612J</text:p>
          </table:table-cell>
          <table:table-cell office:value-type="string">
            <text:p>Laura</text:p>
          </table:table-cell>
          <table:table-cell office:value-type="string">
            <text:p>Benedetti</text:p>
          </table:table-cell>
          <table:table-cell office:value-type="date" office:date-value="1995-07-17" table:style-name="DateCell">
            <text:p>1995-07-17</text:p>
          </table:table-cell>
          <table:table-cell office:value-type="string">
            <text:p>Firenze</text:p>
          </table:table-cell>
          <table:table-cell office:value-type="string">
            <text:p>Via Ghibellina 34, Firenze</text:p>
          </table:table-cell>
        </table:table-row>
        <table:table-row>
          <table:table-cell office:value-type="string">
            <text:p>BNCLSN96F05L219M</text:p>
          </table:table-cell>
          <table:table-cell office:value-type="string">
            <text:p>Elisa</text:p>
          </table:table-cell>
          <table:table-cell office:value-type="string">
            <text:p>Bonciani</text:p>
          </table:table-cell>
          <table:table-cell office:value-type="date" office:date-value="1996-06-05" table:style-name="DateCell">
            <text:p>1996-06-05</text:p>
          </table:table-cell>
          <table:table-cell office:value-type="string">
            <text:p>Torino</text:p>
          </table:table-cell>
          <table:table-cell office:value-type="string">
            <text:p>Via Bertola 29, Torino</text:p>
          </table:table-cell>
        </table:table-row>
        <table:table-row>
          <table:table-cell office:value-type="string">
            <text:p>BNFLBN87C23L219D</text:p>
          </table:table-cell>
          <table:table-cell office:value-type="string">
            <text:p>Fabio</text:p>
          </table:table-cell>
          <table:table-cell office:value-type="string">
            <text:p>Benfenati</text:p>
          </table:table-cell>
          <table:table-cell office:value-type="date" office:date-value="1987-03-23" table:style-name="DateCell">
            <text:p>1987-03-23</text:p>
          </table:table-cell>
          <table:table-cell office:value-type="string">
            <text:p>Torino</text:p>
          </table:table-cell>
          <table:table-cell office:value-type="string">
            <text:p>Via Garibaldi 55, Torino</text:p>
          </table:table-cell>
        </table:table-row>
        <table:table-row>
          <table:table-cell office:value-type="string">
            <text:p>BNFLGT85H27L736Q</text:p>
          </table:table-cell>
          <table:table-cell office:value-type="string">
            <text:p>Luigi</text:p>
          </table:table-cell>
          <table:table-cell office:value-type="string">
            <text:p>Bonfiglio</text:p>
          </table:table-cell>
          <table:table-cell office:value-type="date" office:date-value="1985-08-27" table:style-name="DateCell">
            <text:p>1985-08-27</text:p>
          </table:table-cell>
          <table:table-cell office:value-type="string">
            <text:p>Venezia</text:p>
          </table:table-cell>
          <table:table-cell office:value-type="string">
            <text:p>Rio Terà dei Nomboli 1, Venezia</text:p>
          </table:table-cell>
        </table:table-row>
        <table:table-row>
          <table:table-cell office:value-type="string">
            <text:p>BNFMSS77L19L219C</text:p>
          </table:table-cell>
          <table:table-cell office:value-type="string">
            <text:p>Massimo</text:p>
          </table:table-cell>
          <table:table-cell office:value-type="string">
            <text:p>Bonfiglio</text:p>
          </table:table-cell>
          <table:table-cell office:value-type="date" office:date-value="1977-12-19" table:style-name="DateCell">
            <text:p>1977-12-19</text:p>
          </table:table-cell>
          <table:table-cell office:value-type="string">
            <text:p>Torino</text:p>
          </table:table-cell>
          <table:table-cell office:value-type="string">
            <text:p>Via della Rocca 41, Torino</text:p>
          </table:table-cell>
        </table:table-row>
        <table:table-row>
          <table:table-cell office:value-type="string">
            <text:p>BRNGNN83C22A271Z</text:p>
          </table:table-cell>
          <table:table-cell office:value-type="string">
            <text:p>Giovanni</text:p>
          </table:table-cell>
          <table:table-cell office:value-type="string">
            <text:p>Bruni</text:p>
          </table:table-cell>
          <table:table-cell office:value-type="date" office:date-value="1983-03-22" table:style-name="DateCell">
            <text:p>1983-03-22</text:p>
          </table:table-cell>
          <table:table-cell office:value-type="string">
            <text:p>Bari</text:p>
          </table:table-cell>
          <table:table-cell office:value-type="string">
            <text:p>Via Abate Gimma 60, Bari</text:p>
          </table:table-cell>
        </table:table-row>
        <table:table-row>
          <table:table-cell office:value-type="string">
            <text:p>BRNLSS90B01D612M</text:p>
          </table:table-cell>
          <table:table-cell office:value-type="string">
            <text:p>Elisa</text:p>
          </table:table-cell>
          <table:table-cell office:value-type="string">
            <text:p>Borrani</text:p>
          </table:table-cell>
          <table:table-cell office:value-type="date" office:date-value="1990-02-01" table:style-name="DateCell">
            <text:p>1990-02-01</text:p>
          </table:table-cell>
          <table:table-cell office:value-type="string">
            <text:p>Firenze</text:p>
          </table:table-cell>
          <table:table-cell office:value-type="string">
            <text:p>Via Romana 47, Firenze</text:p>
          </table:table-cell>
        </table:table-row>
        <table:table-row>
          <table:table-cell office:value-type="string">
            <text:p>BRNMRC71H17F205A</text:p>
          </table:table-cell>
          <table:table-cell office:value-type="string">
            <text:p>Marco</text:p>
          </table:table-cell>
          <table:table-cell office:value-type="string">
            <text:p>Bernaudo</text:p>
          </table:table-cell>
          <table:table-cell office:value-type="date" office:date-value="1971-08-17" table:style-name="DateCell">
            <text:p>1971-08-17</text:p>
          </table:table-cell>
          <table:table-cell office:value-type="string">
            <text:p>Milano</text:p>
          </table:table-cell>
          <table:table-cell office:value-type="string">
            <text:p>Via Padova 66, Milano</text:p>
          </table:table-cell>
        </table:table-row>
        <table:table-row>
          <table:table-cell office:value-type="string">
            <text:p>BRTGNN96L09D612E</text:p>
          </table:table-cell>
          <table:table-cell office:value-type="string">
            <text:p>Giovanni</text:p>
          </table:table-cell>
          <table:table-cell office:value-type="string">
            <text:p>Bartolini</text:p>
          </table:table-cell>
          <table:table-cell office:value-type="date" office:date-value="1996-12-09" table:style-name="DateCell">
            <text:p>1996-12-09</text:p>
          </table:table-cell>
          <table:table-cell office:value-type="string">
            <text:p>Firenze</text:p>
          </table:table-cell>
          <table:table-cell office:value-type="string">
            <text:p>Via dei Pilastri 18, Firenze</text:p>
          </table:table-cell>
        </table:table-row>
        <table:table-row>
          <table:table-cell office:value-type="string">
            <text:p>BRTLRT65G07D612T</text:p>
          </table:table-cell>
          <table:table-cell office:value-type="string">
            <text:p>Alberto</text:p>
          </table:table-cell>
          <table:table-cell office:value-type="string">
            <text:p>Bertolini</text:p>
          </table:table-cell>
          <table:table-cell office:value-type="date" office:date-value="1965-07-07" table:style-name="DateCell">
            <text:p>1965-07-07</text:p>
          </table:table-cell>
          <table:table-cell office:value-type="string">
            <text:p>Firenze</text:p>
          </table:table-cell>
          <table:table-cell office:value-type="string">
            <text:p>Via dei Servi 9, Firenze</text:p>
          </table:table-cell>
        </table:table-row>
        <table:table-row>
          <table:table-cell office:value-type="string">
            <text:p>BTTNDR90A31A271V</text:p>
          </table:table-cell>
          <table:table-cell office:value-type="string">
            <text:p>Andrea</text:p>
          </table:table-cell>
          <table:table-cell office:value-type="string">
            <text:p>Battistini</text:p>
          </table:table-cell>
          <table:table-cell office:value-type="date" office:date-value="1990-01-31" table:style-name="DateCell">
            <text:p>1990-01-31</text:p>
          </table:table-cell>
          <table:table-cell office:value-type="string">
            <text:p>Bari</text:p>
          </table:table-cell>
          <table:table-cell office:value-type="string">
            <text:p>Via Putignani 77, Bari</text:p>
          </table:table-cell>
        </table:table-row>
        <table:table-row>
          <table:table-cell office:value-type="string">
            <text:p>CLDLSN89E15L219L</text:p>
          </table:table-cell>
          <table:table-cell office:value-type="string">
            <text:p>Claudio</text:p>
          </table:table-cell>
          <table:table-cell office:value-type="string">
            <text:p>Lorusso</text:p>
          </table:table-cell>
          <table:table-cell office:value-type="date" office:date-value="1989-05-15" table:style-name="DateCell">
            <text:p>1989-05-15</text:p>
          </table:table-cell>
          <table:table-cell office:value-type="string">
            <text:p>Torino</text:p>
          </table:table-cell>
          <table:table-cell office:value-type="string">
            <text:p>Via Roma 7, Torino</text:p>
          </table:table-cell>
        </table:table-row>
        <table:table-row>
          <table:table-cell office:value-type="string">
            <text:p>CLLMRC67G06F839L</text:p>
          </table:table-cell>
          <table:table-cell office:value-type="string">
            <text:p>Marco</text:p>
          </table:table-cell>
          <table:table-cell office:value-type="string">
            <text:p>Callipo</text:p>
          </table:table-cell>
          <table:table-cell office:value-type="date" office:date-value="1967-07-06" table:style-name="DateCell">
            <text:p>1967-07-06</text:p>
          </table:table-cell>
          <table:table-cell office:value-type="string">
            <text:p>Napoli</text:p>
          </table:table-cell>
          <table:table-cell office:value-type="string">
            <text:p>Via Foria 88, Napoli</text:p>
          </table:table-cell>
        </table:table-row>
        <table:table-row>
          <table:table-cell office:value-type="string">
            <text:p>CLLNNA73H07L219G</text:p>
          </table:table-cell>
          <table:table-cell office:value-type="string">
            <text:p>Anna</text:p>
          </table:table-cell>
          <table:table-cell office:value-type="string">
            <text:p>Calleri</text:p>
          </table:table-cell>
          <table:table-cell office:value-type="date" office:date-value="1973-08-07" table:style-name="DateCell">
            <text:p>1973-08-07</text:p>
          </table:table-cell>
          <table:table-cell office:value-type="string">
            <text:p>Torino</text:p>
          </table:table-cell>
          <table:table-cell office:value-type="string">
            <text:p>Via Nizza 120, Torino</text:p>
          </table:table-cell>
        </table:table-row>
        <table:table-row>
          <table:table-cell office:value-type="string">
            <text:p>CLLNTN92F15F205G</text:p>
          </table:table-cell>
          <table:table-cell office:value-type="string">
            <text:p>Antonio</text:p>
          </table:table-cell>
          <table:table-cell office:value-type="string">
            <text:p>Cellini</text:p>
          </table:table-cell>
          <table:table-cell office:value-type="date" office:date-value="1992-06-15" table:style-name="DateCell">
            <text:p>1992-06-15</text:p>
          </table:table-cell>
          <table:table-cell office:value-type="string">
            <text:p>Milano</text:p>
          </table:table-cell>
          <table:table-cell office:value-type="string">
            <text:p>Corso di Porta Ticinese 50, Milano</text:p>
          </table:table-cell>
        </table:table-row>
        <table:table-row>
          <table:table-cell office:value-type="string">
            <text:p>CLMLSS92D24F839C</text:p>
          </table:table-cell>
          <table:table-cell office:value-type="string">
            <text:p>Melissa</text:p>
          </table:table-cell>
          <table:table-cell office:value-type="string">
            <text:p>Colombo</text:p>
          </table:table-cell>
          <table:table-cell office:value-type="date" office:date-value="1992-04-24" table:style-name="DateCell">
            <text:p>1992-04-24</text:p>
          </table:table-cell>
          <table:table-cell office:value-type="string">
            <text:p>Napoli</text:p>
          </table:table-cell>
          <table:table-cell office:value-type="string">
            <text:p>Via Chiaia 43, Napoli</text:p>
          </table:table-cell>
        </table:table-row>
        <table:table-row>
          <table:table-cell office:value-type="string">
            <text:p>CMPNTN76E14F839D</text:p>
          </table:table-cell>
          <table:table-cell office:value-type="string">
            <text:p>Antonio</text:p>
          </table:table-cell>
          <table:table-cell office:value-type="string">
            <text:p>Campana</text:p>
          </table:table-cell>
          <table:table-cell office:value-type="date" office:date-value="1976-05-14" table:style-name="DateCell">
            <text:p>1976-05-14</text:p>
          </table:table-cell>
          <table:table-cell office:value-type="string">
            <text:p>Napoli</text:p>
          </table:table-cell>
          <table:table-cell office:value-type="string">
            <text:p>Via Medina 14, Napoli</text:p>
          </table:table-cell>
        </table:table-row>
        <table:table-row>
          <table:table-cell office:value-type="string">
            <text:p>CNTMSS82B21L219W</text:p>
          </table:table-cell>
          <table:table-cell office:value-type="string">
            <text:p>Massimo</text:p>
          </table:table-cell>
          <table:table-cell office:value-type="string">
            <text:p>Cantore</text:p>
          </table:table-cell>
          <table:table-cell office:value-type="date" office:date-value="1982-02-21" table:style-name="DateCell">
            <text:p>1982-02-21</text:p>
          </table:table-cell>
          <table:table-cell office:value-type="string">
            <text:p>Torino</text:p>
          </table:table-cell>
          <table:table-cell office:value-type="string">
            <text:p>Via San Quintino 50, Torino</text:p>
          </table:table-cell>
        </table:table-row>
        <table:table-row>
          <table:table-cell office:value-type="string">
            <text:p>CNTNTN83H08A271S</text:p>
          </table:table-cell>
          <table:table-cell office:value-type="string">
            <text:p>Antonio</text:p>
          </table:table-cell>
          <table:table-cell office:value-type="string">
            <text:p>Conte</text:p>
          </table:table-cell>
          <table:table-cell office:value-type="date" office:date-value="1983-08-08" table:style-name="DateCell">
            <text:p>1983-08-08</text:p>
          </table:table-cell>
          <table:table-cell office:value-type="string">
            <text:p>Bari</text:p>
          </table:table-cell>
          <table:table-cell office:value-type="string">
            <text:p>Via Sparano da Bari 54, Bari</text:p>
          </table:table-cell>
        </table:table-row>
        <table:table-row>
          <table:table-cell office:value-type="string">
            <text:p>CPRPTR77C02L219T</text:p>
          </table:table-cell>
          <table:table-cell office:value-type="string">
            <text:p>Patrizia</text:p>
          </table:table-cell>
          <table:table-cell office:value-type="string">
            <text:p>Capri</text:p>
          </table:table-cell>
          <table:table-cell office:value-type="date" office:date-value="1977-03-02" table:style-name="DateCell">
            <text:p>1977-03-02</text:p>
          </table:table-cell>
          <table:table-cell office:value-type="string">
            <text:p>Torino</text:p>
          </table:table-cell>
          <table:table-cell office:value-type="string">
            <text:p>Corso Unione Sovietica 110, Torino</text:p>
          </table:table-cell>
        </table:table-row>
        <table:table-row>
          <table:table-cell office:value-type="string">
            <text:p>CRDNTN89L09L736M</text:p>
          </table:table-cell>
          <table:table-cell office:value-type="string">
            <text:p>Antonio</text:p>
          </table:table-cell>
          <table:table-cell office:value-type="string">
            <text:p>Cardini</text:p>
          </table:table-cell>
          <table:table-cell office:value-type="date" office:date-value="1989-12-09" table:style-name="DateCell">
            <text:p>1989-12-09</text:p>
          </table:table-cell>
          <table:table-cell office:value-type="string">
            <text:p>Venezia</text:p>
          </table:table-cell>
          <table:table-cell office:value-type="string">
            <text:p>Calle Lunga San Barnaba 9, Venezia</text:p>
          </table:table-cell>
        </table:table-row>
        <table:table-row>
          <table:table-cell office:value-type="string">
            <text:p>CRNMTT86A30A271R</text:p>
          </table:table-cell>
          <table:table-cell office:value-type="string">
            <text:p>Matteo</text:p>
          </table:table-cell>
          <table:table-cell office:value-type="string">
            <text:p>Corni</text:p>
          </table:table-cell>
          <table:table-cell office:value-type="date" office:date-value="1986-01-30" table:style-name="DateCell">
            <text:p>1986-01-30</text:p>
          </table:table-cell>
          <table:table-cell office:value-type="string">
            <text:p>Bari</text:p>
          </table:table-cell>
          <table:table-cell office:value-type="string">
            <text:p>Corso Italia 88, Bari</text:p>
          </table:table-cell>
        </table:table-row>
        <table:table-row>
          <table:table-cell office:value-type="string">
            <text:p>CRNNNA67G26G273R</text:p>
          </table:table-cell>
          <table:table-cell office:value-type="string">
            <text:p>Anna</text:p>
          </table:table-cell>
          <table:table-cell office:value-type="string">
            <text:p>Cornacchia</text:p>
          </table:table-cell>
          <table:table-cell office:value-type="date" office:date-value="1967-07-26" table:style-name="DateCell">
            <text:p>1967-07-26</text:p>
          </table:table-cell>
          <table:table-cell office:value-type="string">
            <text:p>Genova</text:p>
          </table:table-cell>
          <table:table-cell office:value-type="string">
            <text:p>Via della Maddalena 6, Genova</text:p>
          </table:table-cell>
        </table:table-row>
        <table:table-row>
          <table:table-cell office:value-type="string">
            <text:p>CRVGNN87F25L736W</text:p>
          </table:table-cell>
          <table:table-cell office:value-type="string">
            <text:p>Gianna</text:p>
          </table:table-cell>
          <table:table-cell office:value-type="string">
            <text:p>Carvi</text:p>
          </table:table-cell>
          <table:table-cell office:value-type="date" office:date-value="1987-06-25" table:style-name="DateCell">
            <text:p>1987-06-25</text:p>
          </table:table-cell>
          <table:table-cell office:value-type="string">
            <text:p>Venezia</text:p>
          </table:table-cell>
          <table:table-cell office:value-type="string">
            <text:p>Ponte dei Pugni 2, Venezia</text:p>
          </table:table-cell>
        </table:table-row>
        <table:table-row>
          <table:table-cell office:value-type="string">
            <text:p>CSTLCN69L30L736W</text:p>
          </table:table-cell>
          <table:table-cell office:value-type="string">
            <text:p>Luciano</text:p>
          </table:table-cell>
          <table:table-cell office:value-type="string">
            <text:p>Castelli</text:p>
          </table:table-cell>
          <table:table-cell office:value-type="date" office:date-value="1969-12-30" table:style-name="DateCell">
            <text:p>1969-12-30</text:p>
          </table:table-cell>
          <table:table-cell office:value-type="string">
            <text:p>Venezia</text:p>
          </table:table-cell>
          <table:table-cell office:value-type="string">
            <text:p>Salizzada San Lio 6, Venezia</text:p>
          </table:table-cell>
        </table:table-row>
        <table:table-row>
          <table:table-cell office:value-type="string">
            <text:p>CSTLLL68B21D612A</text:p>
          </table:table-cell>
          <table:table-cell office:value-type="string">
            <text:p>Liliana</text:p>
          </table:table-cell>
          <table:table-cell office:value-type="string">
            <text:p>Costagliola</text:p>
          </table:table-cell>
          <table:table-cell office:value-type="date" office:date-value="1968-02-21" table:style-name="DateCell">
            <text:p>1968-02-21</text:p>
          </table:table-cell>
          <table:table-cell office:value-type="string">
            <text:p>Firenze</text:p>
          </table:table-cell>
          <table:table-cell office:value-type="string">
            <text:p>Via Sant Agostino 23, Firenze</text:p>
          </table:table-cell>
        </table:table-row>
        <table:table-row>
          <table:table-cell office:value-type="string">
            <text:p>CSTLSN88E05H501V</text:p>
          </table:table-cell>
          <table:table-cell office:value-type="string">
            <text:p>Alessandro</text:p>
          </table:table-cell>
          <table:table-cell office:value-type="string">
            <text:p>Costantini</text:p>
          </table:table-cell>
          <table:table-cell office:value-type="date" office:date-value="1988-05-05" table:style-name="DateCell">
            <text:p>1988-05-05</text:p>
          </table:table-cell>
          <table:table-cell office:value-type="string">
            <text:p>Roma</text:p>
          </table:table-cell>
          <table:table-cell office:value-type="string">
            <text:p>Viale Trastevere 33, Roma</text:p>
          </table:table-cell>
        </table:table-row>
        <table:table-row>
          <table:table-cell office:value-type="string">
            <text:p>DLMGNN91D03H501S</text:p>
          </table:table-cell>
          <table:table-cell office:value-type="string">
            <text:p>Giovanni</text:p>
          </table:table-cell>
          <table:table-cell office:value-type="string">
            <text:p>Delmo</text:p>
          </table:table-cell>
          <table:table-cell office:value-type="date" office:date-value="1991-04-03" table:style-name="DateCell">
            <text:p>1991-04-03</text:p>
          </table:table-cell>
          <table:table-cell office:value-type="string">
            <text:p>Roma</text:p>
          </table:table-cell>
          <table:table-cell office:value-type="string">
            <text:p>Via della Conciliazione 19, Roma</text:p>
          </table:table-cell>
        </table:table-row>
        <table:table-row>
          <table:table-cell office:value-type="string">
            <text:p>DMNCRL90I18H501D</text:p>
          </table:table-cell>
          <table:table-cell office:value-type="string">
            <text:p>Carla</text:p>
          </table:table-cell>
          <table:table-cell office:value-type="string">
            <text:p>D'Amico</text:p>
          </table:table-cell>
          <table:table-cell office:value-type="date" office:date-value="1990-09-18" table:style-name="DateCell">
            <text:p>1990-09-18</text:p>
          </table:table-cell>
          <table:table-cell office:value-type="string">
            <text:p>Roma</text:p>
          </table:table-cell>
          <table:table-cell office:value-type="string">
            <text:p>Via Parioli 88, Roma</text:p>
          </table:table-cell>
        </table:table-row>
        <table:table-row>
          <table:table-cell office:value-type="string">
            <text:p>DMNGZZ80A11F205P</text:p>
          </table:table-cell>
          <table:table-cell office:value-type="string">
            <text:p>Gabriella</text:p>
          </table:table-cell>
          <table:table-cell office:value-type="string">
            <text:p>De Martino</text:p>
          </table:table-cell>
          <table:table-cell office:value-type="date" office:date-value="1980-11-11" table:style-name="DateCell">
            <text:p>1980-11-11</text:p>
          </table:table-cell>
          <table:table-cell office:value-type="string">
            <text:p>Milano</text:p>
          </table:table-cell>
          <table:table-cell office:value-type="string">
            <text:p>Piazza del Duomo 3, Milano</text:p>
          </table:table-cell>
        </table:table-row>
        <table:table-row>
          <table:table-cell office:value-type="string">
            <text:p>DMNNDR68A20H501X</text:p>
          </table:table-cell>
          <table:table-cell office:value-type="string">
            <text:p>Andrea</text:p>
          </table:table-cell>
          <table:table-cell office:value-type="string">
            <text:p>Damiani</text:p>
          </table:table-cell>
          <table:table-cell office:value-type="date" office:date-value="1968-01-20" table:style-name="DateCell">
            <text:p>1968-01-20</text:p>
          </table:table-cell>
          <table:table-cell office:value-type="string">
            <text:p>Roma</text:p>
          </table:table-cell>
          <table:table-cell office:value-type="string">
            <text:p>Via Aventina 3, Roma</text:p>
          </table:table-cell>
        </table:table-row>
        <table:table-row>
          <table:table-cell office:value-type="string">
            <text:p>ESPSRA87L10H501Q</text:p>
          </table:table-cell>
          <table:table-cell office:value-type="string">
            <text:p>Sara</text:p>
          </table:table-cell>
          <table:table-cell office:value-type="string">
            <text:p>Esposito</text:p>
          </table:table-cell>
          <table:table-cell office:value-type="date" office:date-value="1987-10-10" table:style-name="DateCell">
            <text:p>1987-10-10</text:p>
          </table:table-cell>
          <table:table-cell office:value-type="string">
            <text:p>Roma</text:p>
          </table:table-cell>
          <table:table-cell office:value-type="string">
            <text:p>Via del Corso 78, Roma</text:p>
          </table:table-cell>
        </table:table-row>
        <table:table-row>
          <table:table-cell office:value-type="string">
            <text:p>FLPNNA94A20F839B</text:p>
          </table:table-cell>
          <table:table-cell office:value-type="string">
            <text:p>Anna</text:p>
          </table:table-cell>
          <table:table-cell office:value-type="string">
            <text:p>Filippone</text:p>
          </table:table-cell>
          <table:table-cell office:value-type="date" office:date-value="1994-01-20" table:style-name="DateCell">
            <text:p>1994-01-20</text:p>
          </table:table-cell>
          <table:table-cell office:value-type="string">
            <text:p>Napoli</text:p>
          </table:table-cell>
          <table:table-cell office:value-type="string">
            <text:p>Via Posillipo 12, Napoli</text:p>
          </table:table-cell>
        </table:table-row>
        <table:table-row>
          <table:table-cell office:value-type="string">
            <text:p>FLPPTR81B01F205Q</text:p>
          </table:table-cell>
          <table:table-cell office:value-type="string">
            <text:p>Pietro</text:p>
          </table:table-cell>
          <table:table-cell office:value-type="string">
            <text:p>Filippetti</text:p>
          </table:table-cell>
          <table:table-cell office:value-type="date" office:date-value="1981-02-01" table:style-name="DateCell">
            <text:p>1981-02-01</text:p>
          </table:table-cell>
          <table:table-cell office:value-type="string">
            <text:p>Milano</text:p>
          </table:table-cell>
          <table:table-cell office:value-type="string">
            <text:p>Via del Laghetto 6, Milano</text:p>
          </table:table-cell>
        </table:table-row>
        <table:table-row>
          <table:table-cell office:value-type="string">
            <text:p>FNNFDR82A10H501L</text:p>
          </table:table-cell>
          <table:table-cell office:value-type="string">
            <text:p>Federico</text:p>
          </table:table-cell>
          <table:table-cell office:value-type="string">
            <text:p>Fanno</text:p>
          </table:table-cell>
          <table:table-cell office:value-type="date" office:date-value="1982-01-10" table:style-name="DateCell">
            <text:p>1982-01-10</text:p>
          </table:table-cell>
          <table:table-cell office:value-type="string">
            <text:p>Roma</text:p>
          </table:table-cell>
          <table:table-cell office:value-type="string">
            <text:p>Piazza Navona 1, Roma</text:p>
          </table:table-cell>
        </table:table-row>
        <table:table-row>
          <table:table-cell office:value-type="string">
            <text:p>FNTFNZ70C13L736N</text:p>
          </table:table-cell>
          <table:table-cell office:value-type="string">
            <text:p>Francesco</text:p>
          </table:table-cell>
          <table:table-cell office:value-type="string">
            <text:p>Fontana</text:p>
          </table:table-cell>
          <table:table-cell office:value-type="date" office:date-value="1970-03-13" table:style-name="DateCell">
            <text:p>1970-03-13</text:p>
          </table:table-cell>
          <table:table-cell office:value-type="string">
            <text:p>Venezia</text:p>
          </table:table-cell>
          <table:table-cell office:value-type="string">
            <text:p>Fondamenta dei Mori 5, Venezia</text:p>
          </table:table-cell>
        </table:table-row>
        <table:table-row>
          <table:table-cell office:value-type="string">
            <text:p>FRNGNN96C22F839V</text:p>
          </table:table-cell>
          <table:table-cell office:value-type="string">
            <text:p>Gianna</text:p>
          </table:table-cell>
          <table:table-cell office:value-type="string">
            <text:p>Fornaro</text:p>
          </table:table-cell>
          <table:table-cell office:value-type="date" office:date-value="1996-03-22" table:style-name="DateCell">
            <text:p>1996-03-22</text:p>
          </table:table-cell>
          <table:table-cell office:value-type="string">
            <text:p>Napoli</text:p>
          </table:table-cell>
          <table:table-cell office:value-type="string">
            <text:p>Riviera di Chiaia 77, Napoli</text:p>
          </table:table-cell>
        </table:table-row>
        <table:table-row>
          <table:table-cell office:value-type="string">
            <text:p>FRNLSS88I08F839F</text:p>
          </table:table-cell>
          <table:table-cell office:value-type="string">
            <text:p>Elisa</text:p>
          </table:table-cell>
          <table:table-cell office:value-type="string">
            <text:p>Franzoni</text:p>
          </table:table-cell>
          <table:table-cell office:value-type="date" office:date-value="1988-09-08" table:style-name="DateCell">
            <text:p>1988-09-08</text:p>
          </table:table-cell>
          <table:table-cell office:value-type="string">
            <text:p>Napoli</text:p>
          </table:table-cell>
          <table:table-cell office:value-type="string">
            <text:p>Via Luca Giordano 7, Napoli</text:p>
          </table:table-cell>
        </table:table-row>
        <table:table-row>
          <table:table-cell office:value-type="string">
            <text:p>FRNLSS93I28F839T</text:p>
          </table:table-cell>
          <table:table-cell office:value-type="string">
            <text:p>Elisa</text:p>
          </table:table-cell>
          <table:table-cell office:value-type="string">
            <text:p>Franchi</text:p>
          </table:table-cell>
          <table:table-cell office:value-type="date" office:date-value="1993-09-28" table:style-name="DateCell">
            <text:p>1993-09-28</text:p>
          </table:table-cell>
          <table:table-cell office:value-type="string">
            <text:p>Napoli</text:p>
          </table:table-cell>
          <table:table-cell office:value-type="string">
            <text:p>Via Mergellina 19, Napoli</text:p>
          </table:table-cell>
        </table:table-row>
        <table:table-row>
          <table:table-cell office:value-type="string">
            <text:p>FRRELN73G27L219Z</text:p>
          </table:table-cell>
          <table:table-cell office:value-type="string">
            <text:p>Elena</text:p>
          </table:table-cell>
          <table:table-cell office:value-type="string">
            <text:p>Ferrario</text:p>
          </table:table-cell>
          <table:table-cell office:value-type="date" office:date-value="1973-07-27" table:style-name="DateCell">
            <text:p>1973-07-27</text:p>
          </table:table-cell>
          <table:table-cell office:value-type="string">
            <text:p>Torino</text:p>
          </table:table-cell>
          <table:table-cell office:value-type="string">
            <text:p>Via Madama Cristina 30, Torino</text:p>
          </table:table-cell>
        </table:table-row>
        <table:table-row>
          <table:table-cell office:value-type="string">
            <text:p>FRRPLN94L19L736Y</text:p>
          </table:table-cell>
          <table:table-cell office:value-type="string">
            <text:p>Paola</text:p>
          </table:table-cell>
          <table:table-cell office:value-type="string">
            <text:p>Ferrero</text:p>
          </table:table-cell>
          <table:table-cell office:value-type="date" office:date-value="1994-12-19" table:style-name="DateCell">
            <text:p>1994-12-19</text:p>
          </table:table-cell>
          <table:table-cell office:value-type="string">
            <text:p>Venezia</text:p>
          </table:table-cell>
          <table:table-cell office:value-type="string">
            <text:p>Calle dello Spezier 8, Venezia</text:p>
          </table:table-cell>
        </table:table-row>
        <table:table-row>
          <table:table-cell office:value-type="string">
            <text:p>FRRSFN92D04L736W</text:p>
          </table:table-cell>
          <table:table-cell office:value-type="string">
            <text:p>Stefano</text:p>
          </table:table-cell>
          <table:table-cell office:value-type="string">
            <text:p>Ferrari</text:p>
          </table:table-cell>
          <table:table-cell office:value-type="date" office:date-value="1992-04-04" table:style-name="DateCell">
            <text:p>1992-04-04</text:p>
          </table:table-cell>
          <table:table-cell office:value-type="string">
            <text:p>Venezia</text:p>
          </table:table-cell>
          <table:table-cell office:value-type="string">
            <text:p>Calle dei Fabbri 17, Venezia</text:p>
          </table:table-cell>
        </table:table-row>
        <table:table-row>
          <table:table-cell office:value-type="string">
            <text:p>GLLCST92D03F205K</text:p>
          </table:table-cell>
          <table:table-cell office:value-type="string">
            <text:p>Cristina</text:p>
          </table:table-cell>
          <table:table-cell office:value-type="string">
            <text:p>Gallina</text:p>
          </table:table-cell>
          <table:table-cell office:value-type="date" office:date-value="1992-04-03" table:style-name="DateCell">
            <text:p>1992-04-03</text:p>
          </table:table-cell>
          <table:table-cell office:value-type="string">
            <text:p>Milano</text:p>
          </table:table-cell>
          <table:table-cell office:value-type="string">
            <text:p>Piazzale Loreto 5, Milano</text:p>
          </table:table-cell>
        </table:table-row>
        <table:table-row>
          <table:table-cell office:value-type="string">
            <text:p>GLLMRC91I09L219R</text:p>
          </table:table-cell>
          <table:table-cell office:value-type="string">
            <text:p>Marco</text:p>
          </table:table-cell>
          <table:table-cell office:value-type="string">
            <text:p>Gallo</text:p>
          </table:table-cell>
          <table:table-cell office:value-type="date" office:date-value="1991-09-09" table:style-name="DateCell">
            <text:p>1991-09-09</text:p>
          </table:table-cell>
          <table:table-cell office:value-type="string">
            <text:p>Torino</text:p>
          </table:table-cell>
          <table:table-cell office:value-type="string">
            <text:p>Via Po 11, Torino</text:p>
          </table:table-cell>
        </table:table-row>
        <table:table-row>
          <table:table-cell office:value-type="string">
            <text:p>GLLVLT66B11L736G</text:p>
          </table:table-cell>
          <table:table-cell office:value-type="string">
            <text:p>Valentina</text:p>
          </table:table-cell>
          <table:table-cell office:value-type="string">
            <text:p>Galletti</text:p>
          </table:table-cell>
          <table:table-cell office:value-type="date" office:date-value="1966-02-11" table:style-name="DateCell">
            <text:p>1966-02-11</text:p>
          </table:table-cell>
          <table:table-cell office:value-type="string">
            <text:p>Venezia</text:p>
          </table:table-cell>
          <table:table-cell office:value-type="string">
            <text:p>Campo Santa Margherita 3, Venezia</text:p>
          </table:table-cell>
        </table:table-row>
        <table:table-row>
          <table:table-cell office:value-type="string">
            <text:p>GNTFNC89E24A271T</text:p>
          </table:table-cell>
          <table:table-cell office:value-type="string">
            <text:p>Francesca</text:p>
          </table:table-cell>
          <table:table-cell office:value-type="string">
            <text:p>Gentile</text:p>
          </table:table-cell>
          <table:table-cell office:value-type="date" office:date-value="1989-05-24" table:style-name="DateCell">
            <text:p>1989-05-24</text:p>
          </table:table-cell>
          <table:table-cell office:value-type="string">
            <text:p>Bari</text:p>
          </table:table-cell>
          <table:table-cell office:value-type="string">
            <text:p>Via De Rossi 43, Bari</text:p>
          </table:table-cell>
        </table:table-row>
        <table:table-row>
          <table:table-cell office:value-type="string">
            <text:p>GRCMRT76D14H501M</text:p>
          </table:table-cell>
          <table:table-cell office:value-type="string">
            <text:p>Marta</text:p>
          </table:table-cell>
          <table:table-cell office:value-type="string">
            <text:p>Greci</text:p>
          </table:table-cell>
          <table:table-cell office:value-type="date" office:date-value="1976-04-14" table:style-name="DateCell">
            <text:p>1976-04-14</text:p>
          </table:table-cell>
          <table:table-cell office:value-type="string">
            <text:p>Roma</text:p>
          </table:table-cell>
          <table:table-cell office:value-type="string">
            <text:p>Via Appia Nuova 101, Roma</text:p>
          </table:table-cell>
        </table:table-row>
        <table:table-row>
          <table:table-cell office:value-type="string">
            <text:p>GRCMSS84A30F839N</text:p>
          </table:table-cell>
          <table:table-cell office:value-type="string">
            <text:p>Massimo</text:p>
          </table:table-cell>
          <table:table-cell office:value-type="string">
            <text:p>Gracis</text:p>
          </table:table-cell>
          <table:table-cell office:value-type="date" office:date-value="1984-01-30" table:style-name="DateCell">
            <text:p>1984-01-30</text:p>
          </table:table-cell>
          <table:table-cell office:value-type="string">
            <text:p>Napoli</text:p>
          </table:table-cell>
          <table:table-cell office:value-type="string">
            <text:p>Via Epomeo 33, Napoli</text:p>
          </table:table-cell>
        </table:table-row>
        <table:table-row>
          <table:table-cell office:value-type="string">
            <text:p>GRMVLT71D13D612I</text:p>
          </table:table-cell>
          <table:table-cell office:value-type="string">
            <text:p>Valentina</text:p>
          </table:table-cell>
          <table:table-cell office:value-type="string">
            <text:p>Gramaglia</text:p>
          </table:table-cell>
          <table:table-cell office:value-type="date" office:date-value="1971-04-13" table:style-name="DateCell">
            <text:p>1971-04-13</text:p>
          </table:table-cell>
          <table:table-cell office:value-type="string">
            <text:p>Firenze</text:p>
          </table:table-cell>
          <table:table-cell office:value-type="string">
            <text:p>Via dei Lamberti 16, Firenze</text:p>
          </table:table-cell>
        </table:table-row>
        <table:table-row>
          <table:table-cell office:value-type="string">
            <text:p>GRNSMN95H28F205Y</text:p>
          </table:table-cell>
          <table:table-cell office:value-type="string">
            <text:p>Simone</text:p>
          </table:table-cell>
          <table:table-cell office:value-type="string">
            <text:p>Grandi</text:p>
          </table:table-cell>
          <table:table-cell office:value-type="date" office:date-value="1995-08-28" table:style-name="DateCell">
            <text:p>1995-08-28</text:p>
          </table:table-cell>
          <table:table-cell office:value-type="string">
            <text:p>Milano</text:p>
          </table:table-cell>
          <table:table-cell office:value-type="string">
            <text:p>Via Torino 17, Milano</text:p>
          </table:table-cell>
        </table:table-row>
        <table:table-row>
          <table:table-cell office:value-type="string">
            <text:p>GRRFNC91D23F205Y</text:p>
          </table:table-cell>
          <table:table-cell office:value-type="string">
            <text:p>Francesca</text:p>
          </table:table-cell>
          <table:table-cell office:value-type="string">
            <text:p>Guerriero</text:p>
          </table:table-cell>
          <table:table-cell office:value-type="date" office:date-value="1991-04-23" table:style-name="DateCell">
            <text:p>1991-04-23</text:p>
          </table:table-cell>
          <table:table-cell office:value-type="string">
            <text:p>Milano</text:p>
          </table:table-cell>
          <table:table-cell office:value-type="string">
            <text:p>Via Manzoni 11, Milano</text:p>
          </table:table-cell>
        </table:table-row>
        <table:table-row>
          <table:table-cell office:value-type="string">
            <text:p>GRZMRT88F15D612C</text:p>
          </table:table-cell>
          <table:table-cell office:value-type="string">
            <text:p>Marta</text:p>
          </table:table-cell>
          <table:table-cell office:value-type="string">
            <text:p>Graziani</text:p>
          </table:table-cell>
          <table:table-cell office:value-type="date" office:date-value="1988-06-15" table:style-name="DateCell">
            <text:p>1988-06-15</text:p>
          </table:table-cell>
          <table:table-cell office:value-type="string">
            <text:p>Firenze</text:p>
          </table:table-cell>
          <table:table-cell office:value-type="string">
            <text:p>Via dell Oriuolo 28, Firenze</text:p>
          </table:table-cell>
        </table:table-row>
        <table:table-row>
          <table:table-cell office:value-type="string">
            <text:p>LMBGNN65E04G273J</text:p>
          </table:table-cell>
          <table:table-cell office:value-type="string">
            <text:p>Giovanni</text:p>
          </table:table-cell>
          <table:table-cell office:value-type="string">
            <text:p>Lambertucci</text:p>
          </table:table-cell>
          <table:table-cell office:value-type="date" office:date-value="1965-05-04" table:style-name="DateCell">
            <text:p>1965-05-04</text:p>
          </table:table-cell>
          <table:table-cell office:value-type="string">
            <text:p>Genova</text:p>
          </table:table-cell>
          <table:table-cell office:value-type="string">
            <text:p>Via Gropallo 11, Genova</text:p>
          </table:table-cell>
        </table:table-row>
        <table:table-row>
          <table:table-cell office:value-type="string">
            <text:p>LMBLBT75E24G273X</text:p>
          </table:table-cell>
          <table:table-cell office:value-type="string">
            <text:p>Alberto</text:p>
          </table:table-cell>
          <table:table-cell office:value-type="string">
            <text:p>Lombardi</text:p>
          </table:table-cell>
          <table:table-cell office:value-type="date" office:date-value="1975-05-24" table:style-name="DateCell">
            <text:p>1975-05-24</text:p>
          </table:table-cell>
          <table:table-cell office:value-type="string">
            <text:p>Genova</text:p>
          </table:table-cell>
          <table:table-cell office:value-type="string">
            <text:p>Salita Santa Caterina 3, Genova</text:p>
          </table:table-cell>
        </table:table-row>
        <table:table-row>
          <table:table-cell office:value-type="string">
            <text:p>LNZLSS93G16A271B</text:p>
          </table:table-cell>
          <table:table-cell office:value-type="string">
            <text:p>Elisa</text:p>
          </table:table-cell>
          <table:table-cell office:value-type="string">
            <text:p>Lanza</text:p>
          </table:table-cell>
          <table:table-cell office:value-type="date" office:date-value="1993-07-16" table:style-name="DateCell">
            <text:p>1993-07-16</text:p>
          </table:table-cell>
          <table:table-cell office:value-type="string">
            <text:p>Bari</text:p>
          </table:table-cell>
          <table:table-cell office:value-type="string">
            <text:p>Via Capruzzi 10, Bari</text:p>
          </table:table-cell>
        </table:table-row>
        <table:table-row>
          <table:table-cell office:value-type="string">
            <text:p>LRNZNZ71A21L736F</text:p>
          </table:table-cell>
          <table:table-cell office:value-type="string">
            <text:p>Lorenzo</text:p>
          </table:table-cell>
          <table:table-cell office:value-type="string">
            <text:p>Lorenzini</text:p>
          </table:table-cell>
          <table:table-cell office:value-type="date" office:date-value="1971-01-21" table:style-name="DateCell">
            <text:p>1971-01-21</text:p>
          </table:table-cell>
          <table:table-cell office:value-type="string">
            <text:p>Venezia</text:p>
          </table:table-cell>
          <table:table-cell office:value-type="string">
            <text:p>Riva degli Schiavoni 2, Venezia</text:p>
          </table:table-cell>
        </table:table-row>
        <table:table-row>
          <table:table-cell office:value-type="string">
            <text:p>MGNPTR79B22H501E</text:p>
          </table:table-cell>
          <table:table-cell office:value-type="string">
            <text:p>Pietro</text:p>
          </table:table-cell>
          <table:table-cell office:value-type="string">
            <text:p>Magnani</text:p>
          </table:table-cell>
          <table:table-cell office:value-type="date" office:date-value="1979-02-22" table:style-name="DateCell">
            <text:p>1979-02-22</text:p>
          </table:table-cell>
          <table:table-cell office:value-type="string">
            <text:p>Roma</text:p>
          </table:table-cell>
          <table:table-cell office:value-type="string">
            <text:p>Lungotevere dei Mellini 14, Roma</text:p>
          </table:table-cell>
        </table:table-row>
        <table:table-row>
          <table:table-cell office:value-type="string">
            <text:p>MLNCST73D03L736O</text:p>
          </table:table-cell>
          <table:table-cell office:value-type="string">
            <text:p>Cristina</text:p>
          </table:table-cell>
          <table:table-cell office:value-type="string">
            <text:p>Milani</text:p>
          </table:table-cell>
          <table:table-cell office:value-type="date" office:date-value="1973-04-03" table:style-name="DateCell">
            <text:p>1973-04-03</text:p>
          </table:table-cell>
          <table:table-cell office:value-type="string">
            <text:p>Venezia</text:p>
          </table:table-cell>
          <table:table-cell office:value-type="string">
            <text:p>Calle del Traghetto 11, Venezia</text:p>
          </table:table-cell>
        </table:table-row>
        <table:table-row>
          <table:table-cell office:value-type="string">
            <text:p>MNCSVT82F16F839K</text:p>
          </table:table-cell>
          <table:table-cell office:value-type="string">
            <text:p>Salvatore</text:p>
          </table:table-cell>
          <table:table-cell office:value-type="string">
            <text:p>Mancini</text:p>
          </table:table-cell>
          <table:table-cell office:value-type="date" office:date-value="1982-06-16" table:style-name="DateCell">
            <text:p>1982-06-16</text:p>
          </table:table-cell>
          <table:table-cell office:value-type="string">
            <text:p>Napoli</text:p>
          </table:table-cell>
          <table:table-cell office:value-type="string">
            <text:p>Via Caracciolo 28, Napoli</text:p>
          </table:table-cell>
        </table:table-row>
        <table:table-row>
          <table:table-cell office:value-type="string">
            <text:p>MNTCST85C12H501F</text:p>
          </table:table-cell>
          <table:table-cell office:value-type="string">
            <text:p>Cristina</text:p>
          </table:table-cell>
          <table:table-cell office:value-type="string">
            <text:p>Montagna</text:p>
          </table:table-cell>
          <table:table-cell office:value-type="date" office:date-value="1985-03-12" table:style-name="DateCell">
            <text:p>1985-03-12</text:p>
          </table:table-cell>
          <table:table-cell office:value-type="string">
            <text:p>Roma</text:p>
          </table:table-cell>
          <table:table-cell office:value-type="string">
            <text:p>Via Nomentana 72, Roma</text:p>
          </table:table-cell>
        </table:table-row>
        <table:table-row>
          <table:table-cell office:value-type="string">
            <text:p>MNTMSS67I08G273N</text:p>
          </table:table-cell>
          <table:table-cell office:value-type="string">
            <text:p>Massimo</text:p>
          </table:table-cell>
          <table:table-cell office:value-type="string">
            <text:p>Monterisi</text:p>
          </table:table-cell>
          <table:table-cell office:value-type="date" office:date-value="1967-09-08" table:style-name="DateCell">
            <text:p>1967-09-08</text:p>
          </table:table-cell>
          <table:table-cell office:value-type="string">
            <text:p>Genova</text:p>
          </table:table-cell>
          <table:table-cell office:value-type="string">
            <text:p>Via Pré 25, Genova</text:p>
          </table:table-cell>
        </table:table-row>
        <table:table-row>
          <table:table-cell office:value-type="string">
            <text:p>MNTTLR74D23D612U</text:p>
          </table:table-cell>
          <table:table-cell office:value-type="string">
            <text:p>Tailored</text:p>
          </table:table-cell>
          <table:table-cell office:value-type="string">
            <text:p>Montini</text:p>
          </table:table-cell>
          <table:table-cell office:value-type="date" office:date-value="1974-04-23" table:style-name="DateCell">
            <text:p>1974-04-23</text:p>
          </table:table-cell>
          <table:table-cell office:value-type="string">
            <text:p>Firenze</text:p>
          </table:table-cell>
          <table:table-cell office:value-type="string">
            <text:p>Piazza della Repubblica 2, Firenze</text:p>
          </table:table-cell>
        </table:table-row>
        <table:table-row>
          <table:table-cell office:value-type="string">
            <text:p>MNZRRT83B01F205U</text:p>
          </table:table-cell>
          <table:table-cell office:value-type="string">
            <text:p>Roberto</text:p>
          </table:table-cell>
          <table:table-cell office:value-type="string">
            <text:p>Monzani</text:p>
          </table:table-cell>
          <table:table-cell office:value-type="date" office:date-value="1983-02-01" table:style-name="DateCell">
            <text:p>1983-02-01</text:p>
          </table:table-cell>
          <table:table-cell office:value-type="string">
            <text:p>Milano</text:p>
          </table:table-cell>
          <table:table-cell office:value-type="string">
            <text:p>Via Solferino 4, Milano</text:p>
          </table:table-cell>
        </table:table-row>
        <table:table-row>
          <table:table-cell office:value-type="string">
            <text:p>MRLMSS69H27L219U</text:p>
          </table:table-cell>
          <table:table-cell office:value-type="string">
            <text:p>Massimo</text:p>
          </table:table-cell>
          <table:table-cell office:value-type="string">
            <text:p>Marello</text:p>
          </table:table-cell>
          <table:table-cell office:value-type="date" office:date-value="1969-08-27" table:style-name="DateCell">
            <text:p>1969-08-27</text:p>
          </table:table-cell>
          <table:table-cell office:value-type="string">
            <text:p>Torino</text:p>
          </table:table-cell>
          <table:table-cell office:value-type="string">
            <text:p>Corso Galileo Ferraris 22, Torino</text:p>
          </table:table-cell>
        </table:table-row>
        <table:table-row>
          <table:table-cell office:value-type="string">
            <text:p>MRNGNN75F06F839U</text:p>
          </table:table-cell>
          <table:table-cell office:value-type="string">
            <text:p>Giovanni</text:p>
          </table:table-cell>
          <table:table-cell office:value-type="string">
            <text:p>Marini</text:p>
          </table:table-cell>
          <table:table-cell office:value-type="date" office:date-value="1975-06-06" table:style-name="DateCell">
            <text:p>1975-06-06</text:p>
          </table:table-cell>
          <table:table-cell office:value-type="string">
            <text:p>Napoli</text:p>
          </table:table-cell>
          <table:table-cell office:value-type="string">
            <text:p>Via Toledo 22, Napoli</text:p>
          </table:table-cell>
        </table:table-row>
        <table:table-row>
          <table:table-cell office:value-type="string">
            <text:p>MRNMRC66G16G273F</text:p>
          </table:table-cell>
          <table:table-cell office:value-type="string">
            <text:p>Marco</text:p>
          </table:table-cell>
          <table:table-cell office:value-type="string">
            <text:p>Marinucci</text:p>
          </table:table-cell>
          <table:table-cell office:value-type="date" office:date-value="1966-07-16" table:style-name="DateCell">
            <text:p>1966-07-16</text:p>
          </table:table-cell>
          <table:table-cell office:value-type="string">
            <text:p>Genova</text:p>
          </table:table-cell>
          <table:table-cell office:value-type="string">
            <text:p>Via Sestri 7, Genova</text:p>
          </table:table-cell>
        </table:table-row>
        <table:table-row>
          <table:table-cell office:value-type="string">
            <text:p>MRNPTR93I28H501P</text:p>
          </table:table-cell>
          <table:table-cell office:value-type="string">
            <text:p>Pietro</text:p>
          </table:table-cell>
          <table:table-cell office:value-type="string">
            <text:p>Marino</text:p>
          </table:table-cell>
          <table:table-cell office:value-type="date" office:date-value="1993-09-28" table:style-name="DateCell">
            <text:p>1993-09-28</text:p>
          </table:table-cell>
          <table:table-cell office:value-type="string">
            <text:p>Roma</text:p>
          </table:table-cell>
          <table:table-cell office:value-type="string">
            <text:p>Via Gregorio VII 55, Roma</text:p>
          </table:table-cell>
        </table:table-row>
        <table:table-row>
          <table:table-cell office:value-type="string">
            <text:p>PCCNDR92G26H501V</text:p>
          </table:table-cell>
          <table:table-cell office:value-type="string">
            <text:p>Andrea</text:p>
          </table:table-cell>
          <table:table-cell office:value-type="string">
            <text:p>Piccinini</text:p>
          </table:table-cell>
          <table:table-cell office:value-type="date" office:date-value="1992-07-26" table:style-name="DateCell">
            <text:p>1992-07-26</text:p>
          </table:table-cell>
          <table:table-cell office:value-type="string">
            <text:p>Roma</text:p>
          </table:table-cell>
          <table:table-cell office:value-type="string">
            <text:p>Via Ostiense 134, Roma</text:p>
          </table:table-cell>
        </table:table-row>
        <table:table-row>
          <table:table-cell office:value-type="string">
            <text:p>PLLNNA93B12G273O</text:p>
          </table:table-cell>
          <table:table-cell office:value-type="string">
            <text:p>Anna</text:p>
          </table:table-cell>
          <table:table-cell office:value-type="string">
            <text:p>Pellegrini</text:p>
          </table:table-cell>
          <table:table-cell office:value-type="date" office:date-value="1993-12-12" table:style-name="DateCell">
            <text:p>1993-12-12</text:p>
          </table:table-cell>
          <table:table-cell office:value-type="string">
            <text:p>Genova</text:p>
          </table:table-cell>
          <table:table-cell office:value-type="string">
            <text:p>Via XX Settembre 66, Genova</text:p>
          </table:table-cell>
        </table:table-row>
        <table:table-row>
          <table:table-cell office:value-type="string">
            <text:p>PLMLGT82D13L736A</text:p>
          </table:table-cell>
          <table:table-cell office:value-type="string">
            <text:p>Luigi</text:p>
          </table:table-cell>
          <table:table-cell office:value-type="string">
            <text:p>Palma</text:p>
          </table:table-cell>
          <table:table-cell office:value-type="date" office:date-value="1982-04-13" table:style-name="DateCell">
            <text:p>1982-04-13</text:p>
          </table:table-cell>
          <table:table-cell office:value-type="string">
            <text:p>Venezia</text:p>
          </table:table-cell>
          <table:table-cell office:value-type="string">
            <text:p>Fondamenta della Misericordia 7, Venezia</text:p>
          </table:table-cell>
        </table:table-row>
        <table:table-row>
          <table:table-cell office:value-type="string">
            <text:p>PLTMRC91F25F205S</text:p>
          </table:table-cell>
          <table:table-cell office:value-type="string">
            <text:p>Marco</text:p>
          </table:table-cell>
          <table:table-cell office:value-type="string">
            <text:p>Paletti</text:p>
          </table:table-cell>
          <table:table-cell office:value-type="date" office:date-value="1991-06-25" table:style-name="DateCell">
            <text:p>1991-06-25</text:p>
          </table:table-cell>
          <table:table-cell office:value-type="string">
            <text:p>Milano</text:p>
          </table:table-cell>
          <table:table-cell office:value-type="string">
            <text:p>Corso Buenos Aires 77, Milano</text:p>
          </table:table-cell>
        </table:table-row>
        <table:table-row>
          <table:table-cell office:value-type="string">
            <text:p>PRLNTN78L29L219O</text:p>
          </table:table-cell>
          <table:table-cell office:value-type="string">
            <text:p>Antonio</text:p>
          </table:table-cell>
          <table:table-cell office:value-type="string">
            <text:p>Prandi</text:p>
          </table:table-cell>
          <table:table-cell office:value-type="date" office:date-value="1978-12-29" table:style-name="DateCell">
            <text:p>1978-12-29</text:p>
          </table:table-cell>
          <table:table-cell office:value-type="string">
            <text:p>Torino</text:p>
          </table:table-cell>
          <table:table-cell office:value-type="string">
            <text:p>Via Ormea 88, Torino</text:p>
          </table:table-cell>
        </table:table-row>
        <table:table-row>
          <table:table-cell office:value-type="string">
            <text:p>PRNLGI64E25D612B</text:p>
          </table:table-cell>
          <table:table-cell office:value-type="string">
            <text:p>Luigi</text:p>
          </table:table-cell>
          <table:table-cell office:value-type="string">
            <text:p>Parente</text:p>
          </table:table-cell>
          <table:table-cell office:value-type="date" office:date-value="1964-05-25" table:style-name="DateCell">
            <text:p>1964-05-25</text:p>
          </table:table-cell>
          <table:table-cell office:value-type="string">
            <text:p>Firenze</text:p>
          </table:table-cell>
          <table:table-cell office:value-type="string">
            <text:p>Via Cavour 8, Firenze</text:p>
          </table:table-cell>
        </table:table-row>
        <table:table-row>
          <table:table-cell office:value-type="string">
            <text:p>PRNNNA79L09F205I</text:p>
          </table:table-cell>
          <table:table-cell office:value-type="string">
            <text:p>Anna</text:p>
          </table:table-cell>
          <table:table-cell office:value-type="string">
            <text:p>Perini</text:p>
          </table:table-cell>
          <table:table-cell office:value-type="date" office:date-value="1979-12-09" table:style-name="DateCell">
            <text:p>1979-12-09</text:p>
          </table:table-cell>
          <table:table-cell office:value-type="string">
            <text:p>Milano</text:p>
          </table:table-cell>
          <table:table-cell office:value-type="string">
            <text:p>Via Paolo Sarpi 18, Milano</text:p>
          </table:table-cell>
        </table:table-row>
        <table:table-row>
          <table:table-cell office:value-type="string">
            <text:p>PRTLGT85H17L736E</text:p>
          </table:table-cell>
          <table:table-cell office:value-type="string">
            <text:p>Luigi</text:p>
          </table:table-cell>
          <table:table-cell office:value-type="string">
            <text:p>Porta</text:p>
          </table:table-cell>
          <table:table-cell office:value-type="date" office:date-value="1985-08-17" table:style-name="DateCell">
            <text:p>1985-08-17</text:p>
          </table:table-cell>
          <table:table-cell office:value-type="string">
            <text:p>Venezia</text:p>
          </table:table-cell>
          <table:table-cell office:value-type="string">
            <text:p>Campiello dei Meloni 4, Venezia</text:p>
          </table:table-cell>
        </table:table-row>
        <table:table-row>
          <table:table-cell office:value-type="string">
            <text:p>RGNLCN95B11L219K</text:p>
          </table:table-cell>
          <table:table-cell office:value-type="string">
            <text:p>Luciana</text:p>
          </table:table-cell>
          <table:table-cell office:value-type="string">
            <text:p>Ragonese</text:p>
          </table:table-cell>
          <table:table-cell office:value-type="date" office:date-value="1995-02-11" table:style-name="DateCell">
            <text:p>1995-02-11</text:p>
          </table:table-cell>
          <table:table-cell office:value-type="string">
            <text:p>Torino</text:p>
          </table:table-cell>
          <table:table-cell office:value-type="string">
            <text:p>Via della Consolata 14, Torino</text:p>
          </table:table-cell>
        </table:table-row>
        <table:table-row>
          <table:table-cell office:value-type="string">
            <text:p>RNZMRC81A10A271D</text:p>
          </table:table-cell>
          <table:table-cell office:value-type="string">
            <text:p>Marco</text:p>
          </table:table-cell>
          <table:table-cell office:value-type="string">
            <text:p>Ranzato</text:p>
          </table:table-cell>
          <table:table-cell office:value-type="date" office:date-value="1981-01-10" table:style-name="DateCell">
            <text:p>1981-01-10</text:p>
          </table:table-cell>
          <table:table-cell office:value-type="string">
            <text:p>Bari</text:p>
          </table:table-cell>
          <table:table-cell office:value-type="string">
            <text:p>Corso Sonnino 33, Bari</text:p>
          </table:table-cell>
        </table:table-row>
        <table:table-row>
          <table:table-cell office:value-type="string">
            <text:p>RSSMRA85A01H501Z</text:p>
          </table:table-cell>
          <table:table-cell office:value-type="string">
            <text:p>Mario</text:p>
          </table:table-cell>
          <table:table-cell office:value-type="string">
            <text:p>Rossi</text:p>
          </table:table-cell>
          <table:table-cell office:value-type="date" office:date-value="1985-01-01" table:style-name="DateCell">
            <text:p>1985-01-01</text:p>
          </table:table-cell>
          <table:table-cell office:value-type="string">
            <text:p>Roma</text:p>
          </table:table-cell>
          <table:table-cell office:value-type="string">
            <text:p>Via delle Botteghe Oscure 12, Roma</text:p>
          </table:table-cell>
        </table:table-row>
        <table:table-row>
          <table:table-cell office:value-type="string">
            <text:p>RVRLSN90D13L219E</text:p>
          </table:table-cell>
          <table:table-cell office:value-type="string">
            <text:p>Elisa</text:p>
          </table:table-cell>
          <table:table-cell office:value-type="string">
            <text:p>Rivara</text:p>
          </table:table-cell>
          <table:table-cell office:value-type="date" office:date-value="1990-04-13" table:style-name="DateCell">
            <text:p>1990-04-13</text:p>
          </table:table-cell>
          <table:table-cell office:value-type="string">
            <text:p>Torino</text:p>
          </table:table-cell>
          <table:table-cell office:value-type="string">
            <text:p>Via Sacchi 37, Torino</text:p>
          </table:table-cell>
        </table:table-row>
        <table:table-row>
          <table:table-cell office:value-type="string">
            <text:p>RZNMRC88F26H501A</text:p>
          </table:table-cell>
          <table:table-cell office:value-type="string">
            <text:p>Marco</text:p>
          </table:table-cell>
          <table:table-cell office:value-type="string">
            <text:p>Rizzoli</text:p>
          </table:table-cell>
          <table:table-cell office:value-type="date" office:date-value="1988-06-26" table:style-name="DateCell">
            <text:p>1988-06-26</text:p>
          </table:table-cell>
          <table:table-cell office:value-type="string">
            <text:p>Roma</text:p>
          </table:table-cell>
          <table:table-cell office:value-type="string">
            <text:p>Via Nazionale 62, Roma</text:p>
          </table:table-cell>
        </table:table-row>
        <table:table-row>
          <table:table-cell office:value-type="string">
            <text:p>RZZGNN88E04H501N</text:p>
          </table:table-cell>
          <table:table-cell office:value-type="string">
            <text:p>Giovanni</text:p>
          </table:table-cell>
          <table:table-cell office:value-type="string">
            <text:p>Rizzato</text:p>
          </table:table-cell>
          <table:table-cell office:value-type="date" office:date-value="1988-05-04" table:style-name="DateCell">
            <text:p>1988-05-04</text:p>
          </table:table-cell>
          <table:table-cell office:value-type="string">
            <text:p>Roma</text:p>
          </table:table-cell>
          <table:table-cell office:value-type="string">
            <text:p>Piazza Bologna 7, Roma</text:p>
          </table:table-cell>
        </table:table-row>
        <table:table-row>
          <table:table-cell office:value-type="string">
            <text:p>SCRRCC68H18A271I</text:p>
          </table:table-cell>
          <table:table-cell office:value-type="string">
            <text:p>Riccardo</text:p>
          </table:table-cell>
          <table:table-cell office:value-type="string">
            <text:p>Scarpa</text:p>
          </table:table-cell>
          <table:table-cell office:value-type="date" office:date-value="1968-08-18" table:style-name="DateCell">
            <text:p>1968-08-18</text:p>
          </table:table-cell>
          <table:table-cell office:value-type="string">
            <text:p>Bari</text:p>
          </table:table-cell>
          <table:table-cell office:value-type="string">
            <text:p>Corso Cavour 15, Bari</text:p>
          </table:table-cell>
        </table:table-row>
        <table:table-row>
          <table:table-cell office:value-type="string">
            <text:p>SLVMRC92A10G273H</text:p>
          </table:table-cell>
          <table:table-cell office:value-type="string">
            <text:p>Marco</text:p>
          </table:table-cell>
          <table:table-cell office:value-type="string">
            <text:p>Salvatori</text:p>
          </table:table-cell>
          <table:table-cell office:value-type="date" office:date-value="1992-01-10" table:style-name="DateCell">
            <text:p>1992-01-10</text:p>
          </table:table-cell>
          <table:table-cell office:value-type="string">
            <text:p>Genova</text:p>
          </table:table-cell>
          <table:table-cell office:value-type="string">
            <text:p>Via Archimede 9, Genova</text:p>
          </table:table-cell>
        </table:table-row>
        <table:table-row>
          <table:table-cell office:value-type="string">
            <text:p>SPNNDR79C12F839J</text:p>
          </table:table-cell>
          <table:table-cell office:value-type="string">
            <text:p>Andrea</text:p>
          </table:table-cell>
          <table:table-cell office:value-type="string">
            <text:p>Spanò</text:p>
          </table:table-cell>
          <table:table-cell office:value-type="date" office:date-value="1979-03-12" table:style-name="DateCell">
            <text:p>1979-03-12</text:p>
          </table:table-cell>
          <table:table-cell office:value-type="string">
            <text:p>Napoli</text:p>
          </table:table-cell>
          <table:table-cell office:value-type="string">
            <text:p>Piazza del Gesù Nuovo 7, Napoli</text:p>
          </table:table-cell>
        </table:table-row>
        <table:table-row>
          <table:table-cell office:value-type="string">
            <text:p>SRTDVD03C01A794Z</text:p>
          </table:table-cell>
          <table:table-cell office:value-type="string">
            <text:p>Davide</text:p>
          </table:table-cell>
          <table:table-cell office:value-type="string">
            <text:p>Sirtoli</text:p>
          </table:table-cell>
          <table:table-cell office:value-type="date" office:date-value="2003-03-01" table:style-name="DateCell">
            <text:p>2003-03-01</text:p>
          </table:table-cell>
          <table:table-cell office:value-type="string">
            <text:p>Bergamo</text:p>
          </table:table-cell>
          <table:table-cell office:value-type="string">
            <text:p>Via Tresolzio 55, Brembate di Sopra</text:p>
          </table:table-cell>
        </table:table-row>
        <table:table-row>
          <table:table-cell office:value-type="string">
            <text:p>SRTLRA78L29D612S</text:p>
          </table:table-cell>
          <table:table-cell office:value-type="string">
            <text:p>Laura</text:p>
          </table:table-cell>
          <table:table-cell office:value-type="string">
            <text:p>Sartor</text:p>
          </table:table-cell>
          <table:table-cell office:value-type="date" office:date-value="1978-12-29" table:style-name="DateCell">
            <text:p>1978-12-29</text:p>
          </table:table-cell>
          <table:table-cell office:value-type="string">
            <text:p>Firenze</text:p>
          </table:table-cell>
          <table:table-cell office:value-type="string">
            <text:p>Via Tornabuoni 5, Firenze</text:p>
          </table:table-cell>
        </table:table-row>
        <table:table-row>
          <table:table-cell office:value-type="string">
            <text:p>SRTMRC74F05D612Q</text:p>
          </table:table-cell>
          <table:table-cell office:value-type="string">
            <text:p>Marco</text:p>
          </table:table-cell>
          <table:table-cell office:value-type="string">
            <text:p>Sorrentino</text:p>
          </table:table-cell>
          <table:table-cell office:value-type="date" office:date-value="1974-06-05" table:style-name="DateCell">
            <text:p>1974-06-05</text:p>
          </table:table-cell>
          <table:table-cell office:value-type="string">
            <text:p>Firenze</text:p>
          </table:table-cell>
          <table:table-cell office:value-type="string">
            <text:p>Lungarno Corsini 21, Firenze</text:p>
          </table:table-cell>
        </table:table-row>
        <table:table-row>
          <table:table-cell office:value-type="string">
            <text:p>STFPTR89B11F205C</text:p>
          </table:table-cell>
          <table:table-cell office:value-type="string">
            <text:p>Pietro</text:p>
          </table:table-cell>
          <table:table-cell office:value-type="string">
            <text:p>Stefani</text:p>
          </table:table-cell>
          <table:table-cell office:value-type="date" office:date-value="1989-02-11" table:style-name="DateCell">
            <text:p>1989-02-11</text:p>
          </table:table-cell>
          <table:table-cell office:value-type="string">
            <text:p>Milano</text:p>
          </table:table-cell>
          <table:table-cell office:value-type="string">
            <text:p>Via Savona 9, Milano</text:p>
          </table:table-cell>
        </table:table-row>
        <table:table-row>
          <table:table-cell office:value-type="string">
            <text:p>TCCLRA86I18G273Z</text:p>
          </table:table-cell>
          <table:table-cell office:value-type="string">
            <text:p>Laura</text:p>
          </table:table-cell>
          <table:table-cell office:value-type="string">
            <text:p>Tacconi</text:p>
          </table:table-cell>
          <table:table-cell office:value-type="date" office:date-value="1986-09-18" table:style-name="DateCell">
            <text:p>1986-09-18</text:p>
          </table:table-cell>
          <table:table-cell office:value-type="string">
            <text:p>Genova</text:p>
          </table:table-cell>
          <table:table-cell office:value-type="string">
            <text:p>Via Buozzi 4, Genova</text:p>
          </table:table-cell>
        </table:table-row>
        <table:table-row>
          <table:table-cell office:value-type="string">
            <text:p>TGNFNC91H07D612K</text:p>
          </table:table-cell>
          <table:table-cell office:value-type="string">
            <text:p>Francesca</text:p>
          </table:table-cell>
          <table:table-cell office:value-type="string">
            <text:p>Tognon</text:p>
          </table:table-cell>
          <table:table-cell office:value-type="date" office:date-value="1991-08-07" table:style-name="DateCell">
            <text:p>1991-08-07</text:p>
          </table:table-cell>
          <table:table-cell office:value-type="string">
            <text:p>Firenze</text:p>
          </table:table-cell>
          <table:table-cell office:value-type="string">
            <text:p>Via della Vigna Nuova 13, Firenze</text:p>
          </table:table-cell>
        </table:table-row>
        <table:table-row>
          <table:table-cell office:value-type="string">
            <text:p>TRNLDA86E04F839R</text:p>
          </table:table-cell>
          <table:table-cell office:value-type="string">
            <text:p>Elda</text:p>
          </table:table-cell>
          <table:table-cell office:value-type="string">
            <text:p>Tornabene</text:p>
          </table:table-cell>
          <table:table-cell office:value-type="date" office:date-value="1986-05-04" table:style-name="DateCell">
            <text:p>1986-05-04</text:p>
          </table:table-cell>
          <table:table-cell office:value-type="string">
            <text:p>Napoli</text:p>
          </table:table-cell>
          <table:table-cell office:value-type="string">
            <text:p>Via dei Mille 56, Napoli</text:p>
          </table:table-cell>
        </table:table-row>
        <table:table-row>
          <table:table-cell office:value-type="string">
            <text:p>TRNMRC77C02A271L</text:p>
          </table:table-cell>
          <table:table-cell office:value-type="string">
            <text:p>Marco</text:p>
          </table:table-cell>
          <table:table-cell office:value-type="string">
            <text:p>Transillo</text:p>
          </table:table-cell>
          <table:table-cell office:value-type="date" office:date-value="1977-03-02" table:style-name="DateCell">
            <text:p>1977-03-02</text:p>
          </table:table-cell>
          <table:table-cell office:value-type="string">
            <text:p>Bari</text:p>
          </table:table-cell>
          <table:table-cell office:value-type="string">
            <text:p>Via Amendola 99, Bari</text:p>
          </table:table-cell>
        </table:table-row>
        <table:table-row>
          <table:table-cell office:value-type="string">
            <text:p>TRNNNA75C12G273B</text:p>
          </table:table-cell>
          <table:table-cell office:value-type="string">
            <text:p>Anna</text:p>
          </table:table-cell>
          <table:table-cell office:value-type="string">
            <text:p>Trono</text:p>
          </table:table-cell>
          <table:table-cell office:value-type="date" office:date-value="1975-03-12" table:style-name="DateCell">
            <text:p>1975-03-12</text:p>
          </table:table-cell>
          <table:table-cell office:value-type="string">
            <text:p>Genova</text:p>
          </table:table-cell>
          <table:table-cell office:value-type="string">
            <text:p>Via Montallegro 2, Genova</text:p>
          </table:table-cell>
        </table:table-row>
        <table:table-row>
          <table:table-cell office:value-type="string">
            <text:p>TRNRCC88E14A271H</text:p>
          </table:table-cell>
          <table:table-cell office:value-type="string">
            <text:p>Riccardo</text:p>
          </table:table-cell>
          <table:table-cell office:value-type="string">
            <text:p>Trani</text:p>
          </table:table-cell>
          <table:table-cell office:value-type="date" office:date-value="1988-05-14" table:style-name="DateCell">
            <text:p>1988-05-14</text:p>
          </table:table-cell>
          <table:table-cell office:value-type="string">
            <text:p>Bari</text:p>
          </table:table-cell>
          <table:table-cell office:value-type="string">
            <text:p>Via Imbriani 39, Bari</text:p>
          </table:table-cell>
        </table:table-row>
        <table:table-row>
          <table:table-cell office:value-type="string">
            <text:p>TRRMSS86I19F205H</text:p>
          </table:table-cell>
          <table:table-cell office:value-type="string">
            <text:p>Massimo</text:p>
          </table:table-cell>
          <table:table-cell office:value-type="string">
            <text:p>Terranova</text:p>
          </table:table-cell>
          <table:table-cell office:value-type="date" office:date-value="1986-09-19" table:style-name="DateCell">
            <text:p>1986-09-19</text:p>
          </table:table-cell>
          <table:table-cell office:value-type="string">
            <text:p>Milano</text:p>
          </table:table-cell>
          <table:table-cell office:value-type="string">
            <text:p>Via Brera 20, Milano</text:p>
          </table:table-cell>
        </table:table-row>
        <table:table-row>
          <table:table-cell office:value-type="string">
            <text:p>TRRMSS91G06H501H</text:p>
          </table:table-cell>
          <table:table-cell office:value-type="string">
            <text:p>Massimo</text:p>
          </table:table-cell>
          <table:table-cell office:value-type="string">
            <text:p>Terracini</text:p>
          </table:table-cell>
          <table:table-cell office:value-type="date" office:date-value="1991-07-06" table:style-name="DateCell">
            <text:p>1991-07-06</text:p>
          </table:table-cell>
          <table:table-cell office:value-type="string">
            <text:p>Roma</text:p>
          </table:table-cell>
          <table:table-cell office:value-type="string">
            <text:p>Via Merulana 24, Roma</text:p>
          </table:table-cell>
        </table:table-row>
        <table:table-row>
          <table:table-cell office:value-type="string">
            <text:p>TRTLLS94C02G273P</text:p>
          </table:table-cell>
          <table:table-cell office:value-type="string">
            <text:p>Elisa</text:p>
          </table:table-cell>
          <table:table-cell office:value-type="string">
            <text:p>Tortorella</text:p>
          </table:table-cell>
          <table:table-cell office:value-type="date" office:date-value="1994-03-02" table:style-name="DateCell">
            <text:p>1994-03-02</text:p>
          </table:table-cell>
          <table:table-cell office:value-type="string">
            <text:p>Genova</text:p>
          </table:table-cell>
          <table:table-cell office:value-type="string">
            <text:p>Via di Francia 44, Genova</text:p>
          </table:table-cell>
        </table:table-row>
        <table:table-row>
          <table:table-cell office:value-type="string">
            <text:p>VLNNNA81I29G273X</text:p>
          </table:table-cell>
          <table:table-cell office:value-type="string">
            <text:p>Anna</text:p>
          </table:table-cell>
          <table:table-cell office:value-type="string">
            <text:p>Valentini</text:p>
          </table:table-cell>
          <table:table-cell office:value-type="date" office:date-value="1981-09-29" table:style-name="DateCell">
            <text:p>1981-09-29</text:p>
          </table:table-cell>
          <table:table-cell office:value-type="string">
            <text:p>Genova</text:p>
          </table:table-cell>
          <table:table-cell office:value-type="string">
            <text:p>Via Corsica 12, Genova</text:p>
          </table:table-cell>
        </table:table-row>
        <table:table-row>
          <table:table-cell office:value-type="string">
            <text:p>VLNPLN88G06A271P</text:p>
          </table:table-cell>
          <table:table-cell office:value-type="string">
            <text:p>Paolino</text:p>
          </table:table-cell>
          <table:table-cell office:value-type="string">
            <text:p>Valentino</text:p>
          </table:table-cell>
          <table:table-cell office:value-type="date" office:date-value="1988-07-06" table:style-name="DateCell">
            <text:p>1988-07-06</text:p>
          </table:table-cell>
          <table:table-cell office:value-type="string">
            <text:p>Bari</text:p>
          </table:table-cell>
          <table:table-cell office:value-type="string">
            <text:p>Via Argiro 88, Bari</text:p>
          </table:table-cell>
        </table:table-row>
        <table:table-row>
          <table:table-cell office:value-type="string">
            <text:p>VNCMRT87F05L736I</text:p>
          </table:table-cell>
          <table:table-cell office:value-type="string">
            <text:p>Marta</text:p>
          </table:table-cell>
          <table:table-cell office:value-type="string">
            <text:p>Vinciguerra</text:p>
          </table:table-cell>
          <table:table-cell office:value-type="date" office:date-value="1987-06-05" table:style-name="DateCell">
            <text:p>1987-06-05</text:p>
          </table:table-cell>
          <table:table-cell office:value-type="string">
            <text:p>Venezia</text:p>
          </table:table-cell>
          <table:table-cell office:value-type="string">
            <text:p>Corte del Milion 3, Venezia</text:p>
          </table:table-cell>
        </table:table-row>
        <table:table-row>
          <table:table-cell office:value-type="string">
            <text:p>VRDLGI78C03F205X</text:p>
          </table:table-cell>
          <table:table-cell office:value-type="string">
            <text:p>Luigi</text:p>
          </table:table-cell>
          <table:table-cell office:value-type="string">
            <text:p>Verdi</text:p>
          </table:table-cell>
          <table:table-cell office:value-type="date" office:date-value="1978-03-03" table:style-name="DateCell">
            <text:p>1978-03-03</text:p>
          </table:table-cell>
          <table:table-cell office:value-type="string">
            <text:p>Milano</text:p>
          </table:table-cell>
          <table:table-cell office:value-type="string">
            <text:p>Via Montenapoleone 8, Milano</text:p>
          </table:table-cell>
        </table:table-row>
        <table:table-row>
          <table:table-cell office:value-type="string">
            <text:p>VRNCST94L20G273G</text:p>
          </table:table-cell>
          <table:table-cell office:value-type="string">
            <text:p>Cristina</text:p>
          </table:table-cell>
          <table:table-cell office:value-type="string">
            <text:p>Verona</text:p>
          </table:table-cell>
          <table:table-cell office:value-type="date" office:date-value="1994-12-20" table:style-name="DateCell">
            <text:p>1994-12-20</text:p>
          </table:table-cell>
          <table:table-cell office:value-type="string">
            <text:p>Genova</text:p>
          </table:table-cell>
          <table:table-cell office:value-type="string">
            <text:p>Via Balbi 38, Genova</text:p>
          </table:table-cell>
        </table:table-row>
        <table:table-row>
          <table:table-cell office:value-type="string">
            <text:p>ZNGPTR84I08A271J</text:p>
          </table:table-cell>
          <table:table-cell office:value-type="string">
            <text:p>Pietro</text:p>
          </table:table-cell>
          <table:table-cell office:value-type="string">
            <text:p>Zingaretti</text:p>
          </table:table-cell>
          <table:table-cell office:value-type="date" office:date-value="1984-09-08" table:style-name="DateCell">
            <text:p>1984-09-08</text:p>
          </table:table-cell>
          <table:table-cell office:value-type="string">
            <text:p>Bari</text:p>
          </table:table-cell>
          <table:table-cell office:value-type="string">
            <text:p>Via Napoli 55, Bari</text:p>
          </table:table-cell>
        </table:table-row>
      </table:table>
      <table:table table:name="Ospedali">
        <table:table-row>
          <table:table-cell office:value-type="string">
            <text:p>OSP001</text:p>
          </table:table-cell>
          <table:table-cell office:value-type="string">
            <text:p>ASST Grande Ospedale Metropolitano Niguarda</text:p>
          </table:table-cell>
          <table:table-cell office:value-type="string">
            <text:p>Milano</text:p>
          </table:table-cell>
          <table:table-cell office:value-type="string">
            <text:p>Piazza Ospedale Maggiore 3</text:p>
          </table:table-cell>
          <table:table-cell office:value-type="string">
            <text:p>SRTDVD03C01A794Z</text:p>
          </table:table-cell>
          <table:table-cell office:value-type="float" office:value="45.509636">
            <text:p>45.509636</text:p>
          </table:table-cell>
          <table:table-cell office:value-type="float" office:value="9.187182">
            <text:p>9.187182</text:p>
          </table:table-cell>
        </table:table-row>
        <table:table-row>
          <table:table-cell office:value-type="string">
            <text:p>OSP002</text:p>
          </table:table-cell>
          <table:table-cell office:value-type="string">
            <text:p>Fondazione IRCCS Ca Granda Ospedale Maggiore Policlinico</text:p>
          </table:table-cell>
          <table:table-cell office:value-type="string">
            <text:p>Milano</text:p>
          </table:table-cell>
          <table:table-cell office:value-type="string">
            <text:p>Via Francesco Sforza 35</text:p>
          </table:table-cell>
          <table:table-cell office:value-type="string">
            <text:p>FRRSFN92D04L736W</text:p>
          </table:table-cell>
          <table:table-cell office:value-type="float" office:value="45.458842">
            <text:p>45.458842</text:p>
          </table:table-cell>
          <table:table-cell office:value-type="float" office:value="9.194970">
            <text:p>9.194970</text:p>
          </table:table-cell>
        </table:table-row>
        <table:table-row>
          <table:table-cell office:value-type="string">
            <text:p>OSP003</text:p>
          </table:table-cell>
          <table:table-cell office:value-type="string">
            <text:p>ASST Fatebenefratelli Sacco - Presidio Ospedale Sacco</text:p>
          </table:table-cell>
          <table:table-cell office:value-type="string">
            <text:p>Milano</text:p>
          </table:table-cell>
          <table:table-cell office:value-type="string">
            <text:p>Via Giovanni Battista Grassi 74</text:p>
          </table:table-cell>
          <table:table-cell office:value-type="string">
            <text:p>VRDLGI78C03F205X</text:p>
          </table:table-cell>
          <table:table-cell office:value-type="float" office:value="45.518895">
            <text:p>45.518895</text:p>
          </table:table-cell>
          <table:table-cell office:value-type="float" office:value="9.122671">
            <text:p>9.122671</text:p>
          </table:table-cell>
        </table:table-row>
        <table:table-row>
          <table:table-cell office:value-type="string">
            <text:p>OSP004</text:p>
          </table:table-cell>
          <table:table-cell office:value-type="string">
            <text:p>ASST Santi Paolo e Carlo - Presidio San Carlo Borromeo</text:p>
          </table:table-cell>
          <table:table-cell office:value-type="string">
            <text:p>Milano</text:p>
          </table:table-cell>
          <table:table-cell office:value-type="string">
            <text:p>Via Pio II 3</text:p>
          </table:table-cell>
          <table:table-cell office:value-type="string">
            <text:p>CSTLSN88E05H501V</text:p>
          </table:table-cell>
          <table:table-cell office:value-type="float" office:value="45.469486">
            <text:p>45.469486</text:p>
          </table:table-cell>
          <table:table-cell office:value-type="float" office:value="9.114168">
            <text:p>9.114168</text:p>
          </table:table-cell>
        </table:table-row>
        <table:table-row>
          <table:table-cell office:value-type="string">
            <text:p>OSP005</text:p>
          </table:table-cell>
          <table:table-cell office:value-type="string">
            <text:p>ASST Santi Paolo e Carlo - Presidio San Paolo</text:p>
          </table:table-cell>
          <table:table-cell office:value-type="string">
            <text:p>Milano</text:p>
          </table:table-cell>
          <table:table-cell office:value-type="string">
            <text:p>Via Antonio di Rudini 8</text:p>
          </table:table-cell>
          <table:table-cell office:value-type="string">
            <text:p>MRNGNN75F06F839U</text:p>
          </table:table-cell>
          <table:table-cell office:value-type="float" office:value="45.433840">
            <text:p>45.433840</text:p>
          </table:table-cell>
          <table:table-cell office:value-type="float" office:value="9.159811">
            <text:p>9.159811</text:p>
          </table:table-cell>
        </table:table-row>
        <table:table-row>
          <table:table-cell office:value-type="string">
            <text:p>OSP006</text:p>
          </table:table-cell>
          <table:table-cell office:value-type="string">
            <text:p>ASST Fatebenefratelli Sacco - Presidio Buzzi</text:p>
          </table:table-cell>
          <table:table-cell office:value-type="string">
            <text:p>Milano</text:p>
          </table:table-cell>
          <table:table-cell office:value-type="string">
            <text:p>Via Castelvetro 32</text:p>
          </table:table-cell>
          <table:table-cell office:value-type="string">
            <text:p>ESPSRA87L10H501Q</text:p>
          </table:table-cell>
          <table:table-cell office:value-type="float" office:value="45.485821">
            <text:p>45.485821</text:p>
          </table:table-cell>
          <table:table-cell office:value-type="float" office:value="9.166989">
            <text:p>9.166989</text:p>
          </table:table-cell>
        </table:table-row>
        <table:table-row>
          <table:table-cell office:value-type="string">
            <text:p>OSP007</text:p>
          </table:table-cell>
          <table:table-cell office:value-type="string">
            <text:p>ASST Pini CTO - Istituto Ortopedico Gaetano Pini</text:p>
          </table:table-cell>
          <table:table-cell office:value-type="string">
            <text:p>Milano</text:p>
          </table:table-cell>
          <table:table-cell office:value-type="string">
            <text:p>Piazza Cardinale Andrea Ferrari 1</text:p>
          </table:table-cell>
          <table:table-cell office:value-type="string">
            <text:p>DMNGZZ80A11F205P</text:p>
          </table:table-cell>
          <table:table-cell office:value-type="float" office:value="45.454819">
            <text:p>45.454819</text:p>
          </table:table-cell>
          <table:table-cell office:value-type="float" office:value="9.193692">
            <text:p>9.193692</text:p>
          </table:table-cell>
        </table:table-row>
        <table:table-row>
          <table:table-cell office:value-type="string">
            <text:p>OSP008</text:p>
          </table:table-cell>
          <table:table-cell office:value-type="string">
            <text:p>IRCCS Fondazione San Gerardo dei Tintori</text:p>
          </table:table-cell>
          <table:table-cell office:value-type="string">
            <text:p>Monza</text:p>
          </table:table-cell>
          <table:table-cell office:value-type="string">
            <text:p>Via Pergolesi 33</text:p>
          </table:table-cell>
          <table:table-cell office:value-type="string">
            <text:p>MNZRRT83B01F205U</text:p>
          </table:table-cell>
          <table:table-cell office:value-type="float" office:value="45.600909">
            <text:p>45.600909</text:p>
          </table:table-cell>
          <table:table-cell office:value-type="float" office:value="9.260165">
            <text:p>9.260165</text:p>
          </table:table-cell>
        </table:table-row>
        <table:table-row>
          <table:table-cell office:value-type="string">
            <text:p>OSP009</text:p>
          </table:table-cell>
          <table:table-cell office:value-type="string">
            <text:p>ASST Brianza - Presidio Ospedale di Desio</text:p>
          </table:table-cell>
          <table:table-cell office:value-type="string">
            <text:p>Desio</text:p>
          </table:table-cell>
          <table:table-cell office:value-type="string">
            <text:p>Via Mazzini 1</text:p>
          </table:table-cell>
          <table:table-cell office:value-type="string">
            <text:p>GLLMRC91I09L219R</text:p>
          </table:table-cell>
          <table:table-cell office:value-type="float" office:value="45.626427">
            <text:p>45.626427</text:p>
          </table:table-cell>
          <table:table-cell office:value-type="float" office:value="9.196325">
            <text:p>9.196325</text:p>
          </table:table-cell>
        </table:table-row>
        <table:table-row>
          <table:table-cell office:value-type="string">
            <text:p>OSP010</text:p>
          </table:table-cell>
          <table:table-cell office:value-type="string">
            <text:p>ASST Brianza - Presidio Ospedale di Vimercate</text:p>
          </table:table-cell>
          <table:table-cell office:value-type="string">
            <text:p>Vimercate</text:p>
          </table:table-cell>
          <table:table-cell office:value-type="string">
            <text:p>Via Santi Cosma e Damiano 10</text:p>
          </table:table-cell>
          <table:table-cell office:value-type="string">
            <text:p>PLLNNA93B12G273O</text:p>
          </table:table-cell>
          <table:table-cell office:value-type="float" office:value="45.608386">
            <text:p>45.608386</text:p>
          </table:table-cell>
          <table:table-cell office:value-type="float" office:value="9.356529">
            <text:p>9.356529</text:p>
          </table:table-cell>
        </table:table-row>
        <table:table-row>
          <table:table-cell office:value-type="string">
            <text:p>OSP011</text:p>
          </table:table-cell>
          <table:table-cell office:value-type="string">
            <text:p>ASST Papa Giovanni XXIII</text:p>
          </table:table-cell>
          <table:table-cell office:value-type="string">
            <text:p>Bergamo</text:p>
          </table:table-cell>
          <table:table-cell office:value-type="string">
            <text:p>Piazza OMS 1</text:p>
          </table:table-cell>
          <table:table-cell office:value-type="string">
            <text:p>BRTLRT65G07D612T</text:p>
          </table:table-cell>
          <table:table-cell office:value-type="float" office:value="45.685907">
            <text:p>45.685907</text:p>
          </table:table-cell>
          <table:table-cell office:value-type="float" office:value="9.636521">
            <text:p>9.636521</text:p>
          </table:table-cell>
        </table:table-row>
        <table:table-row>
          <table:table-cell office:value-type="string">
            <text:p>OSP012</text:p>
          </table:table-cell>
          <table:table-cell office:value-type="string">
            <text:p>ASST Bergamo Est - Presidio Ospedale di Seriate</text:p>
          </table:table-cell>
          <table:table-cell office:value-type="string">
            <text:p>Seriate</text:p>
          </table:table-cell>
          <table:table-cell office:value-type="string">
            <text:p>Via Paderno 21</text:p>
          </table:table-cell>
          <table:table-cell office:value-type="string">
            <text:p>FNTFNZ70C13L736N</text:p>
          </table:table-cell>
          <table:table-cell office:value-type="float" office:value="45.682884">
            <text:p>45.682884</text:p>
          </table:table-cell>
          <table:table-cell office:value-type="float" office:value="9.717692">
            <text:p>9.717692</text:p>
          </table:table-cell>
        </table:table-row>
        <table:table-row>
          <table:table-cell office:value-type="string">
            <text:p>OSP013</text:p>
          </table:table-cell>
          <table:table-cell office:value-type="string">
            <text:p>ASST Bergamo Ovest - Presidio Ospedale di Treviglio</text:p>
          </table:table-cell>
          <table:table-cell office:value-type="string">
            <text:p>Treviglio</text:p>
          </table:table-cell>
          <table:table-cell office:value-type="string">
            <text:p>Piazzale Ospedale L. Meneguzzo 1</text:p>
          </table:table-cell>
          <table:table-cell office:value-type="string">
            <text:p>CLDLSN89E15L219L</text:p>
          </table:table-cell>
          <table:table-cell office:value-type="float" office:value="45.509948">
            <text:p>45.509948</text:p>
          </table:table-cell>
          <table:table-cell office:value-type="float" office:value="9.611523">
            <text:p>9.611523</text:p>
          </table:table-cell>
        </table:table-row>
        <table:table-row>
          <table:table-cell office:value-type="string">
            <text:p>OSP014</text:p>
          </table:table-cell>
          <table:table-cell office:value-type="string">
            <text:p>ASST Bergamo Ovest - Presidio Ospedale Romano Lombardia</text:p>
          </table:table-cell>
          <table:table-cell office:value-type="string">
            <text:p>Romano di Lombardia</text:p>
          </table:table-cell>
          <table:table-cell office:value-type="string">
            <text:p>Via Martiri della Liberta 5</text:p>
          </table:table-cell>
          <table:table-cell office:value-type="string">
            <text:p>MNCSVT82F16F839K</text:p>
          </table:table-cell>
          <table:table-cell office:value-type="float" office:value="45.519593">
            <text:p>45.519593</text:p>
          </table:table-cell>
          <table:table-cell office:value-type="float" office:value="9.751191">
            <text:p>9.751191</text:p>
          </table:table-cell>
        </table:table-row>
        <table:table-row>
          <table:table-cell office:value-type="string">
            <text:p>OSP015</text:p>
          </table:table-cell>
          <table:table-cell office:value-type="string">
            <text:p>ASST Spedali Civili di Brescia</text:p>
          </table:table-cell>
          <table:table-cell office:value-type="string">
            <text:p>Brescia</text:p>
          </table:table-cell>
          <table:table-cell office:value-type="string">
            <text:p>Piazzale Spedali Civili 1</text:p>
          </table:table-cell>
          <table:table-cell office:value-type="string">
            <text:p>GRMVLT71D13D612I</text:p>
          </table:table-cell>
          <table:table-cell office:value-type="float" office:value="45.556458">
            <text:p>45.556458</text:p>
          </table:table-cell>
          <table:table-cell office:value-type="float" office:value="10.231810">
            <text:p>10.231810</text:p>
          </table:table-cell>
        </table:table-row>
        <table:table-row>
          <table:table-cell office:value-type="string">
            <text:p>OSP016</text:p>
          </table:table-cell>
          <table:table-cell office:value-type="string">
            <text:p>ASST Garda - Presidio Ospedale di Desenzano del Garda</text:p>
          </table:table-cell>
          <table:table-cell office:value-type="string">
            <text:p>Desenzano del Garda</text:p>
          </table:table-cell>
          <table:table-cell office:value-type="string">
            <text:p>Via Marconi 7</text:p>
          </table:table-cell>
          <table:table-cell office:value-type="string">
            <text:p>TRRMSS86I19F205H</text:p>
          </table:table-cell>
          <table:table-cell office:value-type="float" office:value="45.471271">
            <text:p>45.471271</text:p>
          </table:table-cell>
          <table:table-cell office:value-type="float" office:value="10.520729">
            <text:p>10.520729</text:p>
          </table:table-cell>
        </table:table-row>
        <table:table-row>
          <table:table-cell office:value-type="string">
            <text:p>OSP017</text:p>
          </table:table-cell>
          <table:table-cell office:value-type="string">
            <text:p>ASST Franciacorta - Presidio Ospedale di Chiari</text:p>
          </table:table-cell>
          <table:table-cell office:value-type="string">
            <text:p>Chiari</text:p>
          </table:table-cell>
          <table:table-cell office:value-type="string">
            <text:p>Via Cipolla 18</text:p>
          </table:table-cell>
          <table:table-cell office:value-type="string">
            <text:p>VRNCST94L20G273G</text:p>
          </table:table-cell>
          <table:table-cell office:value-type="float" office:value="45.538207">
            <text:p>45.538207</text:p>
          </table:table-cell>
          <table:table-cell office:value-type="float" office:value="9.934270">
            <text:p>9.934270</text:p>
          </table:table-cell>
        </table:table-row>
        <table:table-row>
          <table:table-cell office:value-type="string">
            <text:p>OSP018</text:p>
          </table:table-cell>
          <table:table-cell office:value-type="string">
            <text:p>ASST Valle Camonica - Presidio Ospedale di Esine</text:p>
          </table:table-cell>
          <table:table-cell office:value-type="string">
            <text:p>Esine</text:p>
          </table:table-cell>
          <table:table-cell office:value-type="string">
            <text:p>Via Manzoni 2</text:p>
          </table:table-cell>
          <table:table-cell office:value-type="string">
            <text:p>LRNZNZ71A21L736F</text:p>
          </table:table-cell>
          <table:table-cell office:value-type="float" office:value="45.928370">
            <text:p>45.928370</text:p>
          </table:table-cell>
          <table:table-cell office:value-type="float" office:value="10.248133">
            <text:p>10.248133</text:p>
          </table:table-cell>
        </table:table-row>
        <table:table-row>
          <table:table-cell office:value-type="string">
            <text:p>OSP019</text:p>
          </table:table-cell>
          <table:table-cell office:value-type="string">
            <text:p>ASST Sette Laghi - Presidio Ospedale di Circolo Varese</text:p>
          </table:table-cell>
          <table:table-cell office:value-type="string">
            <text:p>Varese</text:p>
          </table:table-cell>
          <table:table-cell office:value-type="string">
            <text:p>Viale Luigi Borri 57</text:p>
          </table:table-cell>
          <table:table-cell office:value-type="string">
            <text:p>MGNPTR79B22H501E</text:p>
          </table:table-cell>
          <table:table-cell office:value-type="float" office:value="45.809891">
            <text:p>45.809891</text:p>
          </table:table-cell>
          <table:table-cell office:value-type="float" office:value="8.839106">
            <text:p>8.839106</text:p>
          </table:table-cell>
        </table:table-row>
        <table:table-row>
          <table:table-cell office:value-type="string">
            <text:p>OSP020</text:p>
          </table:table-cell>
          <table:table-cell office:value-type="string">
            <text:p>ASST Sette Laghi - Presidio Ospedale Filippo del Ponte</text:p>
          </table:table-cell>
          <table:table-cell office:value-type="string">
            <text:p>Varese</text:p>
          </table:table-cell>
          <table:table-cell office:value-type="string">
            <text:p>Via del Ponte 19</text:p>
          </table:table-cell>
          <table:table-cell office:value-type="string">
            <text:p>BNFLBN87C23L219D</text:p>
          </table:table-cell>
          <table:table-cell office:value-type="float" office:value="45.815521">
            <text:p>45.815521</text:p>
          </table:table-cell>
          <table:table-cell office:value-type="float" office:value="8.834576">
            <text:p>8.834576</text:p>
          </table:table-cell>
        </table:table-row>
        <table:table-row>
          <table:table-cell office:value-type="string">
            <text:p>OSP021</text:p>
          </table:table-cell>
          <table:table-cell office:value-type="string">
            <text:p>ASST Valle Olona - Presidio Ospedale di Busto Arsizio</text:p>
          </table:table-cell>
          <table:table-cell office:value-type="string">
            <text:p>Busto Arsizio</text:p>
          </table:table-cell>
          <table:table-cell office:value-type="string">
            <text:p>Via Arnaldo da Brescia 1</text:p>
          </table:table-cell>
          <table:table-cell office:value-type="string">
            <text:p>CLMLSS92D24F839C</text:p>
          </table:table-cell>
          <table:table-cell office:value-type="float" office:value="45.623152">
            <text:p>45.623152</text:p>
          </table:table-cell>
          <table:table-cell office:value-type="float" office:value="8.846674">
            <text:p>8.846674</text:p>
          </table:table-cell>
        </table:table-row>
        <table:table-row>
          <table:table-cell office:value-type="string">
            <text:p>OSP022</text:p>
          </table:table-cell>
          <table:table-cell office:value-type="string">
            <text:p>ASST Valle Olona - Presidio Ospedale di Gallarate</text:p>
          </table:table-cell>
          <table:table-cell office:value-type="string">
            <text:p>Gallarate</text:p>
          </table:table-cell>
          <table:table-cell office:value-type="string">
            <text:p>Via Pastori 4</text:p>
          </table:table-cell>
          <table:table-cell office:value-type="string">
            <text:p>PRNLGI64E25D612B</text:p>
          </table:table-cell>
          <table:table-cell office:value-type="float" office:value="45.656133">
            <text:p>45.656133</text:p>
          </table:table-cell>
          <table:table-cell office:value-type="float" office:value="8.791643">
            <text:p>8.791643</text:p>
          </table:table-cell>
        </table:table-row>
        <table:table-row>
          <table:table-cell office:value-type="string">
            <text:p>OSP023</text:p>
          </table:table-cell>
          <table:table-cell office:value-type="string">
            <text:p>ASST Lariana - Presidio Ospedale Sant Anna</text:p>
          </table:table-cell>
          <table:table-cell office:value-type="string">
            <text:p>San Fermo della Battaglia</text:p>
          </table:table-cell>
          <table:table-cell office:value-type="string">
            <text:p>Via Ravona 20</text:p>
          </table:table-cell>
          <table:table-cell office:value-type="string">
            <text:p>RZNMRC88F26H501A</text:p>
          </table:table-cell>
          <table:table-cell office:value-type="float" office:value="45.793487">
            <text:p>45.793487</text:p>
          </table:table-cell>
          <table:table-cell office:value-type="float" office:value="9.045351">
            <text:p>9.045351</text:p>
          </table:table-cell>
        </table:table-row>
        <table:table-row>
          <table:table-cell office:value-type="string">
            <text:p>OSP024</text:p>
          </table:table-cell>
          <table:table-cell office:value-type="string">
            <text:p>ASST Lariana - Presidio Ospedale di Cantù</text:p>
          </table:table-cell>
          <table:table-cell office:value-type="string">
            <text:p>Cantu</text:p>
          </table:table-cell>
          <table:table-cell office:value-type="string">
            <text:p>Via Domea 1</text:p>
          </table:table-cell>
          <table:table-cell office:value-type="string">
            <text:p>FRRELN73G27L219Z</text:p>
          </table:table-cell>
          <table:table-cell office:value-type="float" office:value="45.739444">
            <text:p>45.739444</text:p>
          </table:table-cell>
          <table:table-cell office:value-type="float" office:value="9.140000">
            <text:p>9.140000</text:p>
          </table:table-cell>
        </table:table-row>
        <table:table-row>
          <table:table-cell office:value-type="string">
            <text:p>OSP025</text:p>
          </table:table-cell>
          <table:table-cell office:value-type="string">
            <text:p>ASST Lecco - Presidio Ospedale A. Manzoni</text:p>
          </table:table-cell>
          <table:table-cell office:value-type="string">
            <text:p>Lecco</text:p>
          </table:table-cell>
          <table:table-cell office:value-type="string">
            <text:p>Via dell Eremo 9</text:p>
          </table:table-cell>
          <table:table-cell office:value-type="string">
            <text:p>GRNSMN95H28F205Y</text:p>
          </table:table-cell>
          <table:table-cell office:value-type="float" office:value="45.852120">
            <text:p>45.852120</text:p>
          </table:table-cell>
          <table:table-cell office:value-type="float" office:value="9.415120">
            <text:p>9.415120</text:p>
          </table:table-cell>
        </table:table-row>
        <table:table-row>
          <table:table-cell office:value-type="string">
            <text:p>OSP026</text:p>
          </table:table-cell>
          <table:table-cell office:value-type="string">
            <text:p>ASST Valtellina e Alto Lario - Presidio di Sondrio</text:p>
          </table:table-cell>
          <table:table-cell office:value-type="string">
            <text:p>Sondrio</text:p>
          </table:table-cell>
          <table:table-cell office:value-type="string">
            <text:p>Via Stelvio 25</text:p>
          </table:table-cell>
          <table:table-cell office:value-type="string">
            <text:p>VLNNNA81I29G273X</text:p>
          </table:table-cell>
          <table:table-cell office:value-type="float" office:value="46.170947">
            <text:p>46.170947</text:p>
          </table:table-cell>
          <table:table-cell office:value-type="float" office:value="9.880017">
            <text:p>9.880017</text:p>
          </table:table-cell>
        </table:table-row>
        <table:table-row>
          <table:table-cell office:value-type="string">
            <text:p>OSP027</text:p>
          </table:table-cell>
          <table:table-cell office:value-type="string">
            <text:p>ASST Valle Olona - Presidio Ospedale di Saronno</text:p>
          </table:table-cell>
          <table:table-cell office:value-type="string">
            <text:p>Saronno</text:p>
          </table:table-cell>
          <table:table-cell office:value-type="string">
            <text:p>Piazzale Borella 1</text:p>
          </table:table-cell>
          <table:table-cell office:value-type="string">
            <text:p>CSTLCN69L30L736W</text:p>
          </table:table-cell>
          <table:table-cell office:value-type="float" office:value="45.629065">
            <text:p>45.629065</text:p>
          </table:table-cell>
          <table:table-cell office:value-type="float" office:value="9.040237">
            <text:p>9.040237</text:p>
          </table:table-cell>
        </table:table-row>
        <table:table-row>
          <table:table-cell office:value-type="string">
            <text:p>OSP028</text:p>
          </table:table-cell>
          <table:table-cell office:value-type="string">
            <text:p>ASST Lodi - Presidio Ospedale Maggiore di Lodi</text:p>
          </table:table-cell>
          <table:table-cell office:value-type="string">
            <text:p>Lodi</text:p>
          </table:table-cell>
          <table:table-cell office:value-type="string">
            <text:p>Largo Donatori del Sangue 1</text:p>
          </table:table-cell>
          <table:table-cell office:value-type="string">
            <text:p>BTTNDR90A31A271V</text:p>
          </table:table-cell>
          <table:table-cell office:value-type="float" office:value="45.314845">
            <text:p>45.314845</text:p>
          </table:table-cell>
          <table:table-cell office:value-type="float" office:value="9.511399">
            <text:p>9.511399</text:p>
          </table:table-cell>
        </table:table-row>
        <table:table-row>
          <table:table-cell office:value-type="string">
            <text:p>OSP029</text:p>
          </table:table-cell>
          <table:table-cell office:value-type="string">
            <text:p>ASST Cremona - Presidio Ospedale di Cremona</text:p>
          </table:table-cell>
          <table:table-cell office:value-type="string">
            <text:p>Cremona</text:p>
          </table:table-cell>
          <table:table-cell office:value-type="string">
            <text:p>Viale Concordia 1</text:p>
          </table:table-cell>
          <table:table-cell office:value-type="string">
            <text:p>CPRPTR77C02L219T</text:p>
          </table:table-cell>
          <table:table-cell office:value-type="float" office:value="45.128805">
            <text:p>45.128805</text:p>
          </table:table-cell>
          <table:table-cell office:value-type="float" office:value="10.054324">
            <text:p>10.054324</text:p>
          </table:table-cell>
        </table:table-row>
        <table:table-row>
          <table:table-cell office:value-type="string">
            <text:p>OSP030</text:p>
          </table:table-cell>
          <table:table-cell office:value-type="string">
            <text:p>ASST Cremona - Presidio Ospedale di Crema</text:p>
          </table:table-cell>
          <table:table-cell office:value-type="string">
            <text:p>Crema</text:p>
          </table:table-cell>
          <table:table-cell office:value-type="string">
            <text:p>Largo Ugo Dossena 2</text:p>
          </table:table-cell>
          <table:table-cell office:value-type="string">
            <text:p>DLMGNN91D03H501S</text:p>
          </table:table-cell>
          <table:table-cell office:value-type="float" office:value="45.353677">
            <text:p>45.353677</text:p>
          </table:table-cell>
          <table:table-cell office:value-type="float" office:value="9.680570">
            <text:p>9.680570</text:p>
          </table:table-cell>
        </table:table-row>
        <table:table-row>
          <table:table-cell office:value-type="string">
            <text:p>OSP031</text:p>
          </table:table-cell>
          <table:table-cell office:value-type="string">
            <text:p>ASST Mantova - Presidio Ospedale Carlo Poma</text:p>
          </table:table-cell>
          <table:table-cell office:value-type="string">
            <text:p>Mantova</text:p>
          </table:table-cell>
          <table:table-cell office:value-type="string">
            <text:p>Via Albertoni 1</text:p>
          </table:table-cell>
          <table:table-cell office:value-type="string">
            <text:p>TRNLDA86E04F839R</text:p>
          </table:table-cell>
          <table:table-cell office:value-type="float" office:value="45.144833">
            <text:p>45.144833</text:p>
          </table:table-cell>
          <table:table-cell office:value-type="float" office:value="10.773240">
            <text:p>10.773240</text:p>
          </table:table-cell>
        </table:table-row>
        <table:table-row>
          <table:table-cell office:value-type="string">
            <text:p>OSP032</text:p>
          </table:table-cell>
          <table:table-cell office:value-type="string">
            <text:p>IRCCS Policlinico San Matteo</text:p>
          </table:table-cell>
          <table:table-cell office:value-type="string">
            <text:p>Pavia</text:p>
          </table:table-cell>
          <table:table-cell office:value-type="string">
            <text:p>Viale Camillo Golgi 19</text:p>
          </table:table-cell>
          <table:table-cell office:value-type="string">
            <text:p>SRTMRC74F05D612Q</text:p>
          </table:table-cell>
          <table:table-cell office:value-type="float" office:value="45.196220">
            <text:p>45.196220</text:p>
          </table:table-cell>
          <table:table-cell office:value-type="float" office:value="9.148841">
            <text:p>9.148841</text:p>
          </table:table-cell>
        </table:table-row>
        <table:table-row>
          <table:table-cell office:value-type="string">
            <text:p>OSP033</text:p>
          </table:table-cell>
          <table:table-cell office:value-type="string">
            <text:p>ASST Pavia - Presidio Ospedale Civile di Vigevano</text:p>
          </table:table-cell>
          <table:table-cell office:value-type="string">
            <text:p>Vigevano</text:p>
          </table:table-cell>
          <table:table-cell office:value-type="string">
            <text:p>Via dei Campi 4</text:p>
          </table:table-cell>
          <table:table-cell office:value-type="string">
            <text:p>VLNPLN88G06A271P</text:p>
          </table:table-cell>
          <table:table-cell office:value-type="float" office:value="45.320496">
            <text:p>45.320496</text:p>
          </table:table-cell>
          <table:table-cell office:value-type="float" office:value="8.865891">
            <text:p>8.865891</text:p>
          </table:table-cell>
        </table:table-row>
        <table:table-row>
          <table:table-cell office:value-type="string">
            <text:p>OSP034</text:p>
          </table:table-cell>
          <table:table-cell office:value-type="string">
            <text:p>ASST Melegnano Martesana - Presidio Ospedale di Vizzolo Predabissi</text:p>
          </table:table-cell>
          <table:table-cell office:value-type="string">
            <text:p>Vizzolo Predabissi</text:p>
          </table:table-cell>
          <table:table-cell office:value-type="string">
            <text:p>Via Pandina 1</text:p>
          </table:table-cell>
          <table:table-cell office:value-type="string">
            <text:p>BCCLSS93H07F205O</text:p>
          </table:table-cell>
          <table:table-cell office:value-type="float" office:value="45.358941">
            <text:p>45.358941</text:p>
          </table:table-cell>
          <table:table-cell office:value-type="float" office:value="9.340624">
            <text:p>9.340624</text:p>
          </table:table-cell>
        </table:table-row>
        <table:table-row>
          <table:table-cell office:value-type="string">
            <text:p>OSP035</text:p>
          </table:table-cell>
          <table:table-cell office:value-type="string">
            <text:p>ASST Nord Milano - Presidio Ospedale Bassini di Cinisello Balsamo</text:p>
          </table:table-cell>
          <table:table-cell office:value-type="string">
            <text:p>Cinisello Balsamo</text:p>
          </table:table-cell>
          <table:table-cell office:value-type="string">
            <text:p>Via Gorki 50</text:p>
          </table:table-cell>
          <table:table-cell office:value-type="string">
            <text:p>MNTMSS67I08G273N</text:p>
          </table:table-cell>
          <table:table-cell office:value-type="float" office:value="45.546410">
            <text:p>45.546410</text:p>
          </table:table-cell>
          <table:table-cell office:value-type="float" office:value="9.215812">
            <text:p>9.215812</text:p>
          </table:table-cell>
        </table:table-row>
      </table:table>
      <table:table table:name="Patologia">
        <table:table-row>
          <table:table-cell office:value-type="string">
            <text:p>P01</text:p>
          </table:table-cell>
          <table:table-cell office:value-type="string">
            <text:p>Rinite allergica stagional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02</text:p>
          </table:table-cell>
          <table:table-cell office:value-type="string">
            <text:p>Dermatite da contatto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03</text:p>
          </table:table-cell>
          <table:table-cell office:value-type="string">
            <text:p>Congiuntivite batteric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04</text:p>
          </table:table-cell>
          <table:table-cell office:value-type="string">
            <text:p>Lombalgia muscolo-tensiv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05</text:p>
          </table:table-cell>
          <table:table-cell office:value-type="string">
            <text:p>Gastrite lie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06</text:p>
          </table:table-cell>
          <table:table-cell office:value-type="string">
            <text:p>Cefalea tensiv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07</text:p>
          </table:table-cell>
          <table:table-cell office:value-type="string">
            <text:p>Verruche cutane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08</text:p>
          </table:table-cell>
          <table:table-cell office:value-type="string">
            <text:p>Ipertensione arteriosa essenzial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09</text:p>
          </table:table-cell>
          <table:table-cell office:value-type="string">
            <text:p>Diabete mellito tipo 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10</text:p>
          </table:table-cell>
          <table:table-cell office:value-type="string">
            <text:p>Ipotiroidismo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11</text:p>
          </table:table-cell>
          <table:table-cell office:value-type="string">
            <text:p>Asma bronchiale lieve persistent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12</text:p>
          </table:table-cell>
          <table:table-cell office:value-type="string">
            <text:p>Sindrome del colon irritabil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13</text:p>
          </table:table-cell>
          <table:table-cell office:value-type="string">
            <text:p>Depressione lieve-moderata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14</text:p>
          </table:table-cell>
          <table:table-cell office:value-type="string">
            <text:p>Osteoporosi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15</text:p>
          </table:table-cell>
          <table:table-cell office:value-type="string">
            <text:p>Dislipidemia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16</text:p>
          </table:table-cell>
          <table:table-cell office:value-type="string">
            <text:p>Insufficienza renale cronica stadio 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17</text:p>
          </table:table-cell>
          <table:table-cell office:value-type="string">
            <text:p>Broncopneumopatia cronica ostruttiva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18</text:p>
          </table:table-cell>
          <table:table-cell office:value-type="string">
            <text:p>Fibrillazione atrial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19</text:p>
          </table:table-cell>
          <table:table-cell office:value-type="string">
            <text:p>Epilessia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20</text:p>
          </table:table-cell>
          <table:table-cell office:value-type="string">
            <text:p>Artrite reumatoid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21</text:p>
          </table:table-cell>
          <table:table-cell office:value-type="string">
            <text:p>Morbo di Crohn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22</text:p>
          </table:table-cell>
          <table:table-cell office:value-type="string">
            <text:p>Insufficienza cardiaca compensata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23</text:p>
          </table:table-cell>
          <table:table-cell office:value-type="string">
            <text:p>Sclerosi multipla recidivant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24</text:p>
          </table:table-cell>
          <table:table-cell office:value-type="string">
            <text:p>Infarto miocardico acuto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25</text:p>
          </table:table-cell>
          <table:table-cell office:value-type="string">
            <text:p>Ictus ischemico cerebral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26</text:p>
          </table:table-cell>
          <table:table-cell office:value-type="string">
            <text:p>Cirrosi epatica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27</text:p>
          </table:table-cell>
          <table:table-cell office:value-type="string">
            <text:p>Leucemia linfatica cronica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28</text:p>
          </table:table-cell>
          <table:table-cell office:value-type="string">
            <text:p>Insufficienza renale cronica stadio 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29</text:p>
          </table:table-cell>
          <table:table-cell office:value-type="string">
            <text:p>Embolia polmonare massiva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30</text:p>
          </table:table-cell>
          <table:table-cell office:value-type="string">
            <text:p>Diabete mellito tipo 1 scompensato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31</text:p>
          </table:table-cell>
          <table:table-cell office:value-type="string">
            <text:p>Sepsi gra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32</text:p>
          </table:table-cell>
          <table:table-cell office:value-type="string">
            <text:p>Carcinoma polmonare a piccole cellul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33</text:p>
          </table:table-cell>
          <table:table-cell office:value-type="string">
            <text:p>Glioblastoma multiform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34</text:p>
          </table:table-cell>
          <table:table-cell office:value-type="string">
            <text:p>Insufficienza multiorgano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35</text:p>
          </table:table-cell>
          <table:table-cell office:value-type="string">
            <text:p>Shock anafilattico</text:p>
          </table:table-cell>
          <table:table-cell office:value-type="float" office:value="5">
            <text:p>5</text:p>
          </table:table-cell>
        </table:table-row>
      </table:table>
      <table:table table:name="PatologiaCronica">
        <table:table-row>
          <table:table-cell office:value-type="string">
            <text:p>P01</text:p>
          </table:table-cell>
        </table:table-row>
        <table:table-row>
          <table:table-cell office:value-type="string">
            <text:p>P02</text:p>
          </table:table-cell>
        </table:table-row>
        <table:table-row>
          <table:table-cell office:value-type="string">
            <text:p>P08</text:p>
          </table:table-cell>
        </table:table-row>
        <table:table-row>
          <table:table-cell office:value-type="string">
            <text:p>P09</text:p>
          </table:table-cell>
        </table:table-row>
        <table:table-row>
          <table:table-cell office:value-type="string">
            <text:p>P10</text:p>
          </table:table-cell>
        </table:table-row>
        <table:table-row>
          <table:table-cell office:value-type="string">
            <text:p>P11</text:p>
          </table:table-cell>
        </table:table-row>
        <table:table-row>
          <table:table-cell office:value-type="string">
            <text:p>P12</text:p>
          </table:table-cell>
        </table:table-row>
        <table:table-row>
          <table:table-cell office:value-type="string">
            <text:p>P13</text:p>
          </table:table-cell>
        </table:table-row>
        <table:table-row>
          <table:table-cell office:value-type="string">
            <text:p>P14</text:p>
          </table:table-cell>
        </table:table-row>
        <table:table-row>
          <table:table-cell office:value-type="string">
            <text:p>P15</text:p>
          </table:table-cell>
        </table:table-row>
        <table:table-row>
          <table:table-cell office:value-type="string">
            <text:p>P16</text:p>
          </table:table-cell>
        </table:table-row>
        <table:table-row>
          <table:table-cell office:value-type="string">
            <text:p>P17</text:p>
          </table:table-cell>
        </table:table-row>
        <table:table-row>
          <table:table-cell office:value-type="string">
            <text:p>P18</text:p>
          </table:table-cell>
        </table:table-row>
        <table:table-row>
          <table:table-cell office:value-type="string">
            <text:p>P19</text:p>
          </table:table-cell>
        </table:table-row>
        <table:table-row>
          <table:table-cell office:value-type="string">
            <text:p>P20</text:p>
          </table:table-cell>
        </table:table-row>
        <table:table-row>
          <table:table-cell office:value-type="string">
            <text:p>P21</text:p>
          </table:table-cell>
        </table:table-row>
        <table:table-row>
          <table:table-cell office:value-type="string">
            <text:p>P22</text:p>
          </table:table-cell>
        </table:table-row>
        <table:table-row>
          <table:table-cell office:value-type="string">
            <text:p>P23</text:p>
          </table:table-cell>
        </table:table-row>
        <table:table-row>
          <table:table-cell office:value-type="string">
            <text:p>P26</text:p>
          </table:table-cell>
        </table:table-row>
        <table:table-row>
          <table:table-cell office:value-type="string">
            <text:p>P27</text:p>
          </table:table-cell>
        </table:table-row>
        <table:table-row>
          <table:table-cell office:value-type="string">
            <text:p>P28</text:p>
          </table:table-cell>
        </table:table-row>
        <table:table-row>
          <table:table-cell office:value-type="string">
            <text:p>P30</text:p>
          </table:table-cell>
        </table:table-row>
      </table:table>
      <table:table table:name="PatologiaMortale">
        <table:table-row>
          <table:table-cell office:value-type="string">
            <text:p>P24</text:p>
          </table:table-cell>
        </table:table-row>
        <table:table-row>
          <table:table-cell office:value-type="string">
            <text:p>P25</text:p>
          </table:table-cell>
        </table:table-row>
        <table:table-row>
          <table:table-cell office:value-type="string">
            <text:p>P26</text:p>
          </table:table-cell>
        </table:table-row>
        <table:table-row>
          <table:table-cell office:value-type="string">
            <text:p>P27</text:p>
          </table:table-cell>
        </table:table-row>
        <table:table-row>
          <table:table-cell office:value-type="string">
            <text:p>P28</text:p>
          </table:table-cell>
        </table:table-row>
        <table:table-row>
          <table:table-cell office:value-type="string">
            <text:p>P29</text:p>
          </table:table-cell>
        </table:table-row>
        <table:table-row>
          <table:table-cell office:value-type="string">
            <text:p>P31</text:p>
          </table:table-cell>
        </table:table-row>
        <table:table-row>
          <table:table-cell office:value-type="string">
            <text:p>P32</text:p>
          </table:table-cell>
        </table:table-row>
        <table:table-row>
          <table:table-cell office:value-type="string">
            <text:p>P33</text:p>
          </table:table-cell>
        </table:table-row>
        <table:table-row>
          <table:table-cell office:value-type="string">
            <text:p>P34</text:p>
          </table:table-cell>
        </table:table-row>
        <table:table-row>
          <table:table-cell office:value-type="string">
            <text:p>P35</text:p>
          </table:table-cell>
        </table:table-row>
      </table:table>
      <table:table table:name="PatologiaRicovero"/>
      <table:table table:name="Ricovero">
        <table:table-row>
          <table:table-cell office:value-type="string">
            <text:p>OSP011</text:p>
          </table:table-cell>
          <table:table-cell office:value-type="string">
            <text:p>RIC0000001</text:p>
          </table:table-cell>
          <table:table-cell office:value-type="string">
            <text:p>RSSMRA85A01H501Z</text:p>
          </table:table-cell>
          <table:table-cell office:value-type="date" office:date-value="2024-01-05" table:style-name="DateCell">
            <text:p>2024-01-05</text:p>
          </table:table-cell>
          <table:table-cell office:value-type="float" office:value="96.30">
            <text:p>96.30</text:p>
          </table:table-cell>
          <table:table-cell office:value-type="string">
            <text:p>Appendicite acuta</text:p>
          </table:table-cell>
          <table:table-cell office:value-type="float" office:value="850.00">
            <text:p>850.00</text:p>
          </table:table-cell>
        </table:table-row>
        <table:table-row>
          <table:table-cell office:value-type="string">
            <text:p>OSP001</text:p>
          </table:table-cell>
          <table:table-cell office:value-type="string">
            <text:p>RIC0000002</text:p>
          </table:table-cell>
          <table:table-cell office:value-type="string">
            <text:p>GLLVLT66B11L736G</text:p>
          </table:table-cell>
          <table:table-cell office:value-type="date" office:date-value="2024-01-08" table:style-name="DateCell">
            <text:p>2024-01-08</text:p>
          </table:table-cell>
          <table:table-cell office:value-type="float" office:value="168.15">
            <text:p>168.15</text:p>
          </table:table-cell>
          <table:table-cell office:value-type="string">
            <text:p>Polmonite batterica</text:p>
          </table:table-cell>
          <table:table-cell office:value-type="float" office:value="1540.00">
            <text:p>1540.00</text:p>
          </table:table-cell>
        </table:table-row>
        <table:table-row>
          <table:table-cell office:value-type="string">
            <text:p>OSP015</text:p>
          </table:table-cell>
          <table:table-cell office:value-type="string">
            <text:p>RIC0000003</text:p>
          </table:table-cell>
          <table:table-cell office:value-type="string">
            <text:p>CLLMRC67G06F839L</text:p>
          </table:table-cell>
          <table:table-cell office:value-type="date" office:date-value="2024-01-12" table:style-name="DateCell">
            <text:p>2024-01-12</text:p>
          </table:table-cell>
          <table:table-cell office:value-type="float" office:value="48.00">
            <text:p>48.00</text:p>
          </table:table-cell>
          <table:table-cell office:value-type="string">
            <text:p>Frattura polso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string">
            <text:p>OSP032</text:p>
          </table:table-cell>
          <table:table-cell office:value-type="string">
            <text:p>RIC0000004</text:p>
          </table:table-cell>
          <table:table-cell office:value-type="string">
            <text:p>TRNMRC77C02A271L</text:p>
          </table:table-cell>
          <table:table-cell office:value-type="date" office:date-value="2024-01-15" table:style-name="DateCell">
            <text:p>2024-01-15</text:p>
          </table:table-cell>
          <table:table-cell office:value-type="float" office:value="240.45">
            <text:p>240.45</text:p>
          </table:table-cell>
          <table:table-cell office:value-type="string">
            <text:p>Infarto miocardico</text:p>
          </table:table-cell>
          <table:table-cell office:value-type="float" office:value="3200.00">
            <text:p>3200.00</text:p>
          </table:table-cell>
        </table:table-row>
        <table:table-row>
          <table:table-cell office:value-type="string">
            <text:p>OSP008</text:p>
          </table:table-cell>
          <table:table-cell office:value-type="string">
            <text:p>RIC0000005</text:p>
          </table:table-cell>
          <table:table-cell office:value-type="string">
            <text:p>FLPNNA94A20F839B</text:p>
          </table:table-cell>
          <table:table-cell office:value-type="date" office:date-value="2024-01-20" table:style-name="DateCell">
            <text:p>2024-01-20</text:p>
          </table:table-cell>
          <table:table-cell office:value-type="float" office:value="72.20">
            <text:p>72.20</text:p>
          </table:table-cell>
          <table:table-cell office:value-type="string">
            <text:p>Colecistite acuta</text:p>
          </table:table-cell>
          <table:table-cell office:value-type="float" office:value="760.00">
            <text:p>760.00</text:p>
          </table:table-cell>
        </table:table-row>
        <table:table-row>
          <table:table-cell office:value-type="string">
            <text:p>OSP025</text:p>
          </table:table-cell>
          <table:table-cell office:value-type="string">
            <text:p>RIC0000006</text:p>
          </table:table-cell>
          <table:table-cell office:value-type="string">
            <text:p>BRNMRC71H17F205A</text:p>
          </table:table-cell>
          <table:table-cell office:value-type="date" office:date-value="2024-01-22" table:style-name="DateCell">
            <text:p>2024-01-22</text:p>
          </table:table-cell>
          <table:table-cell office:value-type="float" office:value="120.50">
            <text:p>120.50</text:p>
          </table:table-cell>
          <table:table-cell office:value-type="string">
            <text:p>Ernia inguinale</text:p>
          </table:table-cell>
          <table:table-cell office:value-type="float" office:value="930.00">
            <text:p>930.00</text:p>
          </table:table-cell>
        </table:table-row>
        <table:table-row>
          <table:table-cell office:value-type="string">
            <text:p>OSP003</text:p>
          </table:table-cell>
          <table:table-cell office:value-type="string">
            <text:p>RIC0000007</text:p>
          </table:table-cell>
          <table:table-cell office:value-type="string">
            <text:p>DMNCRL90I18H501D</text:p>
          </table:table-cell>
          <table:table-cell office:value-type="date" office:date-value="2024-01-28" table:style-name="DateCell">
            <text:p>2024-01-28</text:p>
          </table:table-cell>
          <table:table-cell office:value-type="float" office:value="144.35">
            <text:p>144.35</text:p>
          </table:table-cell>
          <table:table-cell office:value-type="string">
            <text:p>Pielonefrite acuta</text:p>
          </table:table-cell>
          <table:table-cell office:value-type="float" office:value="1100.00">
            <text:p>1100.00</text:p>
          </table:table-cell>
        </table:table-row>
        <table:table-row>
          <table:table-cell office:value-type="string">
            <text:p>OSP019</text:p>
          </table:table-cell>
          <table:table-cell office:value-type="string">
            <text:p>RIC0000008</text:p>
          </table:table-cell>
          <table:table-cell office:value-type="string">
            <text:p>MNCSVT82F16F839K</text:p>
          </table:table-cell>
          <table:table-cell office:value-type="date" office:date-value="2024-02-02" table:style-name="DateCell">
            <text:p>2024-02-02</text:p>
          </table:table-cell>
          <table:table-cell office:value-type="float" office:value="24.10">
            <text:p>24.10</text:p>
          </table:table-cell>
          <table:table-cell office:value-type="string">
            <text:p>Trauma cranico lieve</text:p>
          </table:table-cell>
          <table:table-cell office:value-type="float" office:value="310.00">
            <text:p>310.00</text:p>
          </table:table-cell>
        </table:table-row>
        <table:table-row>
          <table:table-cell office:value-type="string">
            <text:p>OSP013</text:p>
          </table:table-cell>
          <table:table-cell office:value-type="string">
            <text:p>RIC0000009</text:p>
          </table:table-cell>
          <table:table-cell office:value-type="string">
            <text:p>VLNPLN88G06A271P</text:p>
          </table:table-cell>
          <table:table-cell office:value-type="date" office:date-value="2024-02-05" table:style-name="DateCell">
            <text:p>2024-02-05</text:p>
          </table:table-cell>
          <table:table-cell office:value-type="float" office:value="192.40">
            <text:p>192.40</text:p>
          </table:table-cell>
          <table:table-cell office:value-type="string">
            <text:p>Insufficienza cardiaca</text:p>
          </table:table-cell>
          <table:table-cell office:value-type="float" office:value="2100.00">
            <text:p>2100.00</text:p>
          </table:table-cell>
        </table:table-row>
        <table:table-row>
          <table:table-cell office:value-type="string">
            <text:p>OSP035</text:p>
          </table:table-cell>
          <table:table-cell office:value-type="string">
            <text:p>RIC0000010</text:p>
          </table:table-cell>
          <table:table-cell office:value-type="string">
            <text:p>PLLNNA93B12G273O</text:p>
          </table:table-cell>
          <table:table-cell office:value-type="date" office:date-value="2024-02-09" table:style-name="DateCell">
            <text:p>2024-02-09</text:p>
          </table:table-cell>
          <table:table-cell office:value-type="float" office:value="96.55">
            <text:p>96.55</text:p>
          </table:table-cell>
          <table:table-cell office:value-type="string">
            <text:p>Diabete scompensato</text:p>
          </table:table-cell>
          <table:table-cell office:value-type="float" office:value="880.00">
            <text:p>880.00</text:p>
          </table:table-cell>
        </table:table-row>
        <table:table-row>
          <table:table-cell office:value-type="string">
            <text:p>OSP002</text:p>
          </table:table-cell>
          <table:table-cell office:value-type="string">
            <text:p>RIC0000011</text:p>
          </table:table-cell>
          <table:table-cell office:value-type="string">
            <text:p>ZNGPTR84I08A271J</text:p>
          </table:table-cell>
          <table:table-cell office:value-type="date" office:date-value="2024-02-14" table:style-name="DateCell">
            <text:p>2024-02-14</text:p>
          </table:table-cell>
          <table:table-cell office:value-type="float" office:value="72.05">
            <text:p>72.05</text:p>
          </table:table-cell>
          <table:table-cell office:value-type="string">
            <text:p>Gastroenterite acuta</text:p>
          </table:table-cell>
          <table:table-cell office:value-type="float" office:value="560.00">
            <text:p>560.00</text:p>
          </table:table-cell>
        </table:table-row>
        <table:table-row>
          <table:table-cell office:value-type="string">
            <text:p>OSP028</text:p>
          </table:table-cell>
          <table:table-cell office:value-type="string">
            <text:p>RIC0000012</text:p>
          </table:table-cell>
          <table:table-cell office:value-type="string">
            <text:p>GRMVLT71D13D612I</text:p>
          </table:table-cell>
          <table:table-cell office:value-type="date" office:date-value="2024-02-18" table:style-name="DateCell">
            <text:p>2024-02-18</text:p>
          </table:table-cell>
          <table:table-cell office:value-type="float" office:value="216.25">
            <text:p>216.25</text:p>
          </table:table-cell>
          <table:table-cell office:value-type="string">
            <text:p>Stroke ischemico</text:p>
          </table:table-cell>
          <table:table-cell office:value-type="float" office:value="2800.00">
            <text:p>2800.00</text:p>
          </table:table-cell>
        </table:table-row>
        <table:table-row>
          <table:table-cell office:value-type="string">
            <text:p>OSP021</text:p>
          </table:table-cell>
          <table:table-cell office:value-type="string">
            <text:p>RIC0000013</text:p>
          </table:table-cell>
          <table:table-cell office:value-type="string">
            <text:p>CNTMSS82B21L219W</text:p>
          </table:table-cell>
          <table:table-cell office:value-type="date" office:date-value="2024-02-22" table:style-name="DateCell">
            <text:p>2024-02-22</text:p>
          </table:table-cell>
          <table:table-cell office:value-type="float" office:value="48.30">
            <text:p>48.30</text:p>
          </table:table-cell>
          <table:table-cell office:value-type="string">
            <text:p>Bronchite ostruttiva</text:p>
          </table:table-cell>
          <table:table-cell office:value-type="float" office:value="390.00">
            <text:p>390.00</text:p>
          </table:table-cell>
        </table:table-row>
        <table:table-row>
          <table:table-cell office:value-type="string">
            <text:p>OSP006</text:p>
          </table:table-cell>
          <table:table-cell office:value-type="string">
            <text:p>RIC0000014</text:p>
          </table:table-cell>
          <table:table-cell office:value-type="string">
            <text:p>LMBGNN65E04G273J</text:p>
          </table:table-cell>
          <table:table-cell office:value-type="date" office:date-value="2024-02-26" table:style-name="DateCell">
            <text:p>2024-02-26</text:p>
          </table:table-cell>
          <table:table-cell office:value-type="float" office:value="120.00">
            <text:p>120.00</text:p>
          </table:table-cell>
          <table:table-cell office:value-type="string">
            <text:p>Pancreatite acuta</text:p>
          </table:table-cell>
          <table:table-cell office:value-type="float" office:value="1250.00">
            <text:p>1250.00</text:p>
          </table:table-cell>
        </table:table-row>
        <table:table-row>
          <table:table-cell office:value-type="string">
            <text:p>OSP017</text:p>
          </table:table-cell>
          <table:table-cell office:value-type="string">
            <text:p>RIC0000015</text:p>
          </table:table-cell>
          <table:table-cell office:value-type="string">
            <text:p>BNCLSN96F05L219M</text:p>
          </table:table-cell>
          <table:table-cell office:value-type="date" office:date-value="2024-03-01" table:style-name="DateCell">
            <text:p>2024-03-01</text:p>
          </table:table-cell>
          <table:table-cell office:value-type="float" office:value="168.45">
            <text:p>168.45</text:p>
          </table:table-cell>
          <table:table-cell office:value-type="string">
            <text:p>Polmonite virale</text:p>
          </table:table-cell>
          <table:table-cell office:value-type="float" office:value="1480.00">
            <text:p>1480.00</text:p>
          </table:table-cell>
        </table:table-row>
        <table:table-row>
          <table:table-cell office:value-type="string">
            <text:p>OSP009</text:p>
          </table:table-cell>
          <table:table-cell office:value-type="string">
            <text:p>RIC0000016</text:p>
          </table:table-cell>
          <table:table-cell office:value-type="string">
            <text:p>SCRRCC68H18A271I</text:p>
          </table:table-cell>
          <table:table-cell office:value-type="date" office:date-value="2024-03-05" table:style-name="DateCell">
            <text:p>2024-03-05</text:p>
          </table:table-cell>
          <table:table-cell office:value-type="float" office:value="288.20">
            <text:p>288.20</text:p>
          </table:table-cell>
          <table:table-cell office:value-type="string">
            <text:p>Insufficienza renale acuta</text:p>
          </table:table-cell>
          <table:table-cell office:value-type="float" office:value="3600.00">
            <text:p>3600.00</text:p>
          </table:table-cell>
        </table:table-row>
        <table:table-row>
          <table:table-cell office:value-type="string">
            <text:p>OSP031</text:p>
          </table:table-cell>
          <table:table-cell office:value-type="string">
            <text:p>RIC0000017</text:p>
          </table:table-cell>
          <table:table-cell office:value-type="string">
            <text:p>TRRMSS86I19F205H</text:p>
          </table:table-cell>
          <table:table-cell office:value-type="date" office:date-value="2024-03-08" table:style-name="DateCell">
            <text:p>2024-03-08</text:p>
          </table:table-cell>
          <table:table-cell office:value-type="float" office:value="72.35">
            <text:p>72.35</text:p>
          </table:table-cell>
          <table:table-cell office:value-type="string">
            <text:p>Ulcera peptica</text:p>
          </table:table-cell>
          <table:table-cell office:value-type="float" office:value="720.00">
            <text:p>720.00</text:p>
          </table:table-cell>
        </table:table-row>
        <table:table-row>
          <table:table-cell office:value-type="string">
            <text:p>OSP004</text:p>
          </table:table-cell>
          <table:table-cell office:value-type="string">
            <text:p>RIC0000018</text:p>
          </table:table-cell>
          <table:table-cell office:value-type="string">
            <text:p>FRNLSS88I08F839F</text:p>
          </table:table-cell>
          <table:table-cell office:value-type="date" office:date-value="2024-03-12" table:style-name="DateCell">
            <text:p>2024-03-12</text:p>
          </table:table-cell>
          <table:table-cell office:value-type="float" office:value="144.50">
            <text:p>144.50</text:p>
          </table:table-cell>
          <table:table-cell office:value-type="string">
            <text:p>Trombosi venosa profonda</text:p>
          </table:table-cell>
          <table:table-cell office:value-type="float" office:value="1380.00">
            <text:p>1380.00</text:p>
          </table:table-cell>
        </table:table-row>
        <table:table-row>
          <table:table-cell office:value-type="string">
            <text:p>OSP022</text:p>
          </table:table-cell>
          <table:table-cell office:value-type="string">
            <text:p>RIC0000019</text:p>
          </table:table-cell>
          <table:table-cell office:value-type="string">
            <text:p>GNTFNC89E24A271T</text:p>
          </table:table-cell>
          <table:table-cell office:value-type="date" office:date-value="2024-03-16" table:style-name="DateCell">
            <text:p>2024-03-16</text:p>
          </table:table-cell>
          <table:table-cell office:value-type="float" office:value="96.15">
            <text:p>96.15</text:p>
          </table:table-cell>
          <table:table-cell office:value-type="string">
            <text:p>Calcoli renali</text:p>
          </table:table-cell>
          <table:table-cell office:value-type="float" office:value="890.00">
            <text:p>890.00</text:p>
          </table:table-cell>
        </table:table-row>
        <table:table-row>
          <table:table-cell office:value-type="string">
            <text:p>OSP010</text:p>
          </table:table-cell>
          <table:table-cell office:value-type="string">
            <text:p>RIC0000020</text:p>
          </table:table-cell>
          <table:table-cell office:value-type="string">
            <text:p>MRLMSS69H27L219U</text:p>
          </table:table-cell>
          <table:table-cell office:value-type="date" office:date-value="2024-03-20" table:style-name="DateCell">
            <text:p>2024-03-20</text:p>
          </table:table-cell>
          <table:table-cell office:value-type="float" office:value="48.40">
            <text:p>48.40</text:p>
          </table:table-cell>
          <table:table-cell office:value-type="string">
            <text:p>Lombosciatalgia acuta</text:p>
          </table:table-cell>
          <table:table-cell office:value-type="float" office:value="340.00">
            <text:p>340.00</text:p>
          </table:table-cell>
        </table:table-row>
        <table:table-row>
          <table:table-cell office:value-type="string">
            <text:p>OSP014</text:p>
          </table:table-cell>
          <table:table-cell office:value-type="string">
            <text:p>RIC0000021</text:p>
          </table:table-cell>
          <table:table-cell office:value-type="string">
            <text:p>PLTMRC91F25F205S</text:p>
          </table:table-cell>
          <table:table-cell office:value-type="date" office:date-value="2024-03-25" table:style-name="DateCell">
            <text:p>2024-03-25</text:p>
          </table:table-cell>
          <table:table-cell office:value-type="float" office:value="120.10">
            <text:p>120.10</text:p>
          </table:table-cell>
          <table:table-cell office:value-type="string">
            <text:p>Anemia emolitica</text:p>
          </table:table-cell>
          <table:table-cell office:value-type="float" office:value="1050.00">
            <text:p>1050.00</text:p>
          </table:table-cell>
        </table:table-row>
        <table:table-row>
          <table:table-cell office:value-type="string">
            <text:p>OSP026</text:p>
          </table:table-cell>
          <table:table-cell office:value-type="string">
            <text:p>RIC0000022</text:p>
          </table:table-cell>
          <table:table-cell office:value-type="string">
            <text:p>DLMGNN91D03H501S</text:p>
          </table:table-cell>
          <table:table-cell office:value-type="date" office:date-value="2024-03-28" table:style-name="DateCell">
            <text:p>2024-03-28</text:p>
          </table:table-cell>
          <table:table-cell office:value-type="float" office:value="192.55">
            <text:p>192.55</text:p>
          </table:table-cell>
          <table:table-cell office:value-type="string">
            <text:p>Sepsi</text:p>
          </table:table-cell>
          <table:table-cell office:value-type="float" office:value="2600.00">
            <text:p>2600.00</text:p>
          </table:table-cell>
        </table:table-row>
        <table:table-row>
          <table:table-cell office:value-type="string">
            <text:p>OSP033</text:p>
          </table:table-cell>
          <table:table-cell office:value-type="string">
            <text:p>RIC0000023</text:p>
          </table:table-cell>
          <table:table-cell office:value-type="string">
            <text:p>BCCLSS93H07F205O</text:p>
          </table:table-cell>
          <table:table-cell office:value-type="date" office:date-value="2024-04-02" table:style-name="DateCell">
            <text:p>2024-04-02</text:p>
          </table:table-cell>
          <table:table-cell office:value-type="float" office:value="72.00">
            <text:p>72.00</text:p>
          </table:table-cell>
          <table:table-cell office:value-type="string">
            <text:p>Otite media acuta</text:p>
          </table:table-cell>
          <table:table-cell office:value-type="float" office:value="490.00">
            <text:p>490.00</text:p>
          </table:table-cell>
        </table:table-row>
        <table:table-row>
          <table:table-cell office:value-type="string">
            <text:p>OSP016</text:p>
          </table:table-cell>
          <table:table-cell office:value-type="string">
            <text:p>RIC0000024</text:p>
          </table:table-cell>
          <table:table-cell office:value-type="string">
            <text:p>RVRLSN90D13L219E</text:p>
          </table:table-cell>
          <table:table-cell office:value-type="date" office:date-value="2024-04-06" table:style-name="DateCell">
            <text:p>2024-04-06</text:p>
          </table:table-cell>
          <table:table-cell office:value-type="float" office:value="168.30">
            <text:p>168.30</text:p>
          </table:table-cell>
          <table:table-cell office:value-type="string">
            <text:p>Pleurite</text:p>
          </table:table-cell>
          <table:table-cell office:value-type="float" office:value="1320.00">
            <text:p>1320.00</text:p>
          </table:table-cell>
        </table:table-row>
        <table:table-row>
          <table:table-cell office:value-type="string">
            <text:p>OSP005</text:p>
          </table:table-cell>
          <table:table-cell office:value-type="string">
            <text:p>RIC0000025</text:p>
          </table:table-cell>
          <table:table-cell office:value-type="string">
            <text:p>LMBLBT75E24G273X</text:p>
          </table:table-cell>
          <table:table-cell office:value-type="date" office:date-value="2024-04-10" table:style-name="DateCell">
            <text:p>2024-04-10</text:p>
          </table:table-cell>
          <table:table-cell office:value-type="float" office:value="96.20">
            <text:p>96.20</text:p>
          </table:table-cell>
          <table:table-cell office:value-type="string">
            <text:p>Colite ulcerosa riacutizzata</text:p>
          </table:table-cell>
          <table:table-cell office:value-type="float" office:value="870.00">
            <text:p>870.00</text:p>
          </table:table-cell>
        </table:table-row>
        <table:table-row>
          <table:table-cell office:value-type="string">
            <text:p>OSP029</text:p>
          </table:table-cell>
          <table:table-cell office:value-type="string">
            <text:p>RIC0000026</text:p>
          </table:table-cell>
          <table:table-cell office:value-type="string">
            <text:p>FNNFDR82A10H501L</text:p>
          </table:table-cell>
          <table:table-cell office:value-type="date" office:date-value="2024-04-14" table:style-name="DateCell">
            <text:p>2024-04-14</text:p>
          </table:table-cell>
          <table:table-cell office:value-type="float" office:value="144.05">
            <text:p>144.05</text:p>
          </table:table-cell>
          <table:table-cell office:value-type="string">
            <text:p>Fibrillazione atriale</text:p>
          </table:table-cell>
          <table:table-cell office:value-type="float" office:value="1450.00">
            <text:p>1450.00</text:p>
          </table:table-cell>
        </table:table-row>
        <table:table-row>
          <table:table-cell office:value-type="string">
            <text:p>OSP012</text:p>
          </table:table-cell>
          <table:table-cell office:value-type="string">
            <text:p>RIC0000027</text:p>
          </table:table-cell>
          <table:table-cell office:value-type="string">
            <text:p>GRCMSS84A30F839N</text:p>
          </table:table-cell>
          <table:table-cell office:value-type="date" office:date-value="2024-04-18" table:style-name="DateCell">
            <text:p>2024-04-18</text:p>
          </table:table-cell>
          <table:table-cell office:value-type="float" office:value="48.50">
            <text:p>48.50</text:p>
          </table:table-cell>
          <table:table-cell office:value-type="string">
            <text:p>Contusione costale</text:p>
          </table:table-cell>
          <table:table-cell office:value-type="float" office:value="280.00">
            <text:p>280.00</text:p>
          </table:table-cell>
        </table:table-row>
        <table:table-row>
          <table:table-cell office:value-type="string">
            <text:p>OSP027</text:p>
          </table:table-cell>
          <table:table-cell office:value-type="string">
            <text:p>RIC0000028</text:p>
          </table:table-cell>
          <table:table-cell office:value-type="string">
            <text:p>TGNFNC91H07D612K</text:p>
          </table:table-cell>
          <table:table-cell office:value-type="date" office:date-value="2024-04-22" table:style-name="DateCell">
            <text:p>2024-04-22</text:p>
          </table:table-cell>
          <table:table-cell office:value-type="float" office:value="216.35">
            <text:p>216.35</text:p>
          </table:table-cell>
          <table:table-cell office:value-type="string">
            <text:p>Meningite virale</text:p>
          </table:table-cell>
          <table:table-cell office:value-type="float" office:value="2950.00">
            <text:p>2950.00</text:p>
          </table:table-cell>
        </table:table-row>
        <table:table-row>
          <table:table-cell office:value-type="string">
            <text:p>OSP020</text:p>
          </table:table-cell>
          <table:table-cell office:value-type="string">
            <text:p>RIC0000029</text:p>
          </table:table-cell>
          <table:table-cell office:value-type="string">
            <text:p>CLLNNA73H07L219G</text:p>
          </table:table-cell>
          <table:table-cell office:value-type="date" office:date-value="2024-04-26" table:style-name="DateCell">
            <text:p>2024-04-26</text:p>
          </table:table-cell>
          <table:table-cell office:value-type="float" office:value="120.25">
            <text:p>120.25</text:p>
          </table:table-cell>
          <table:table-cell office:value-type="string">
            <text:p>Ernia del disco</text:p>
          </table:table-cell>
          <table:table-cell office:value-type="float" office:value="1100.00">
            <text:p>1100.00</text:p>
          </table:table-cell>
        </table:table-row>
        <table:table-row>
          <table:table-cell office:value-type="string">
            <text:p>OSP007</text:p>
          </table:table-cell>
          <table:table-cell office:value-type="string">
            <text:p>RIC0000030</text:p>
          </table:table-cell>
          <table:table-cell office:value-type="string">
            <text:p>RZNMRC88F26H501A</text:p>
          </table:table-cell>
          <table:table-cell office:value-type="date" office:date-value="2024-04-30" table:style-name="DateCell">
            <text:p>2024-04-30</text:p>
          </table:table-cell>
          <table:table-cell office:value-type="float" office:value="72.45">
            <text:p>72.45</text:p>
          </table:table-cell>
          <table:table-cell office:value-type="string">
            <text:p>Frattura femore</text:p>
          </table:table-cell>
          <table:table-cell office:value-type="float" office:value="780.00">
            <text:p>780.00</text:p>
          </table:table-cell>
        </table:table-row>
        <table:table-row>
          <table:table-cell office:value-type="string">
            <text:p>OSP023</text:p>
          </table:table-cell>
          <table:table-cell office:value-type="string">
            <text:p>RIC0000031</text:p>
          </table:table-cell>
          <table:table-cell office:value-type="string">
            <text:p>BNFLBN87C23L219D</text:p>
          </table:table-cell>
          <table:table-cell office:value-type="date" office:date-value="2024-05-04" table:style-name="DateCell">
            <text:p>2024-05-04</text:p>
          </table:table-cell>
          <table:table-cell office:value-type="float" office:value="240.10">
            <text:p>240.10</text:p>
          </table:table-cell>
          <table:table-cell office:value-type="string">
            <text:p>Embolia polmonare</text:p>
          </table:table-cell>
          <table:table-cell office:value-type="float" office:value="3100.00">
            <text:p>3100.00</text:p>
          </table:table-cell>
        </table:table-row>
        <table:table-row>
          <table:table-cell office:value-type="string">
            <text:p>OSP034</text:p>
          </table:table-cell>
          <table:table-cell office:value-type="string">
            <text:p>RIC0000032</text:p>
          </table:table-cell>
          <table:table-cell office:value-type="string">
            <text:p>CNTNTN83H08A271S</text:p>
          </table:table-cell>
          <table:table-cell office:value-type="date" office:date-value="2024-05-08" table:style-name="DateCell">
            <text:p>2024-05-08</text:p>
          </table:table-cell>
          <table:table-cell office:value-type="float" office:value="96.40">
            <text:p>96.40</text:p>
          </table:table-cell>
          <table:table-cell office:value-type="string">
            <text:p>Disfunzione tiroidea</text:p>
          </table:table-cell>
          <table:table-cell office:value-type="float" office:value="820.00">
            <text:p>820.00</text:p>
          </table:table-cell>
        </table:table-row>
        <table:table-row>
          <table:table-cell office:value-type="string">
            <text:p>OSP030</text:p>
          </table:table-cell>
          <table:table-cell office:value-type="string">
            <text:p>RIC0000033</text:p>
          </table:table-cell>
          <table:table-cell office:value-type="string">
            <text:p>FRRPLN94L19L736Y</text:p>
          </table:table-cell>
          <table:table-cell office:value-type="date" office:date-value="2024-05-12" table:style-name="DateCell">
            <text:p>2024-05-12</text:p>
          </table:table-cell>
          <table:table-cell office:value-type="float" office:value="144.15">
            <text:p>144.15</text:p>
          </table:table-cell>
          <table:table-cell office:value-type="string">
            <text:p>Pericardite</text:p>
          </table:table-cell>
          <table:table-cell office:value-type="float" office:value="1290.00">
            <text:p>1290.00</text:p>
          </table:table-cell>
        </table:table-row>
        <table:table-row>
          <table:table-cell office:value-type="string">
            <text:p>OSP011</text:p>
          </table:table-cell>
          <table:table-cell office:value-type="string">
            <text:p>RIC0000034</text:p>
          </table:table-cell>
          <table:table-cell office:value-type="string">
            <text:p>CRDNTN89L09L736M</text:p>
          </table:table-cell>
          <table:table-cell office:value-type="date" office:date-value="2024-05-16" table:style-name="DateCell">
            <text:p>2024-05-16</text:p>
          </table:table-cell>
          <table:table-cell office:value-type="float" office:value="48.55">
            <text:p>48.55</text:p>
          </table:table-cell>
          <table:table-cell office:value-type="string">
            <text:p>Laringite acuta</text:p>
          </table:table-cell>
          <table:table-cell office:value-type="float" office:value="270.00">
            <text:p>270.00</text:p>
          </table:table-cell>
        </table:table-row>
        <table:table-row>
          <table:table-cell office:value-type="string">
            <text:p>OSP001</text:p>
          </table:table-cell>
          <table:table-cell office:value-type="string">
            <text:p>RIC0000035</text:p>
          </table:table-cell>
          <table:table-cell office:value-type="string">
            <text:p>GRZMRT88F15D612C</text:p>
          </table:table-cell>
          <table:table-cell office:value-type="date" office:date-value="2024-05-20" table:style-name="DateCell">
            <text:p>2024-05-20</text:p>
          </table:table-cell>
          <table:table-cell office:value-type="float" office:value="192.20">
            <text:p>192.20</text:p>
          </table:table-cell>
          <table:table-cell office:value-type="string">
            <text:p>Epatite acuta</text:p>
          </table:table-cell>
          <table:table-cell office:value-type="float" office:value="1870.00">
            <text:p>1870.00</text:p>
          </table:table-cell>
        </table:table-row>
        <table:table-row>
          <table:table-cell office:value-type="string">
            <text:p>OSP018</text:p>
          </table:table-cell>
          <table:table-cell office:value-type="string">
            <text:p>RIC0000036</text:p>
          </table:table-cell>
          <table:table-cell office:value-type="string">
            <text:p>VNCMRT87F05L736I</text:p>
          </table:table-cell>
          <table:table-cell office:value-type="date" office:date-value="2024-05-24" table:style-name="DateCell">
            <text:p>2024-05-24</text:p>
          </table:table-cell>
          <table:table-cell office:value-type="float" office:value="120.35">
            <text:p>120.35</text:p>
          </table:table-cell>
          <table:table-cell office:value-type="string">
            <text:p>Endometriosi acuta</text:p>
          </table:table-cell>
          <table:table-cell office:value-type="float" office:value="1080.00">
            <text:p>1080.00</text:p>
          </table:table-cell>
        </table:table-row>
        <table:table-row>
          <table:table-cell office:value-type="string">
            <text:p>OSP024</text:p>
          </table:table-cell>
          <table:table-cell office:value-type="string">
            <text:p>RIC0000037</text:p>
          </table:table-cell>
          <table:table-cell office:value-type="string">
            <text:p>MNTCST85C12H501F</text:p>
          </table:table-cell>
          <table:table-cell office:value-type="date" office:date-value="2024-05-28" table:style-name="DateCell">
            <text:p>2024-05-28</text:p>
          </table:table-cell>
          <table:table-cell office:value-type="float" office:value="72.50">
            <text:p>72.50</text:p>
          </table:table-cell>
          <table:table-cell office:value-type="string">
            <text:p>Cisti ovarica</text:p>
          </table:table-cell>
          <table:table-cell office:value-type="float" office:value="640.00">
            <text:p>640.00</text:p>
          </table:table-cell>
        </table:table-row>
        <table:table-row>
          <table:table-cell office:value-type="string">
            <text:p>OSP015</text:p>
          </table:table-cell>
          <table:table-cell office:value-type="string">
            <text:p>RIC0000038</text:p>
          </table:table-cell>
          <table:table-cell office:value-type="string">
            <text:p>PCCNDR92G26H501V</text:p>
          </table:table-cell>
          <table:table-cell office:value-type="date" office:date-value="2024-06-02" table:style-name="DateCell">
            <text:p>2024-06-02</text:p>
          </table:table-cell>
          <table:table-cell office:value-type="float" office:value="168.05">
            <text:p>168.05</text:p>
          </table:table-cell>
          <table:table-cell office:value-type="string">
            <text:p>Diverticolite</text:p>
          </table:table-cell>
          <table:table-cell office:value-type="float" office:value="1560.00">
            <text:p>1560.00</text:p>
          </table:table-cell>
        </table:table-row>
        <table:table-row>
          <table:table-cell office:value-type="string">
            <text:p>OSP032</text:p>
          </table:table-cell>
          <table:table-cell office:value-type="string">
            <text:p>RIC0000039</text:p>
          </table:table-cell>
          <table:table-cell office:value-type="string">
            <text:p>CLLNTN92F15F205G</text:p>
          </table:table-cell>
          <table:table-cell office:value-type="date" office:date-value="2024-06-06" table:style-name="DateCell">
            <text:p>2024-06-06</text:p>
          </table:table-cell>
          <table:table-cell office:value-type="float" office:value="96.30">
            <text:p>96.30</text:p>
          </table:table-cell>
          <table:table-cell office:value-type="string">
            <text:p>Fibrosi polmonare</text:p>
          </table:table-cell>
          <table:table-cell office:value-type="float" office:value="900.00">
            <text:p>900.00</text:p>
          </table:table-cell>
        </table:table-row>
        <table:table-row>
          <table:table-cell office:value-type="string">
            <text:p>OSP008</text:p>
          </table:table-cell>
          <table:table-cell office:value-type="string">
            <text:p>RIC0000040</text:p>
          </table:table-cell>
          <table:table-cell office:value-type="string">
            <text:p>GRRFNC91D23F205Y</text:p>
          </table:table-cell>
          <table:table-cell office:value-type="date" office:date-value="2024-06-10" table:style-name="DateCell">
            <text:p>2024-06-10</text:p>
          </table:table-cell>
          <table:table-cell office:value-type="float" office:value="264.45">
            <text:p>264.45</text:p>
          </table:table-cell>
          <table:table-cell office:value-type="string">
            <text:p>Insufficienza cardiaca acuta</text:p>
          </table:table-cell>
          <table:table-cell office:value-type="float" office:value="3400.00">
            <text:p>3400.00</text:p>
          </table:table-cell>
        </table:table-row>
        <table:table-row>
          <table:table-cell office:value-type="string">
            <text:p>OSP003</text:p>
          </table:table-cell>
          <table:table-cell office:value-type="string">
            <text:p>RIC0000041</text:p>
          </table:table-cell>
          <table:table-cell office:value-type="string">
            <text:p>MLNCST73D03L736O</text:p>
          </table:table-cell>
          <table:table-cell office:value-type="date" office:date-value="2024-06-14" table:style-name="DateCell">
            <text:p>2024-06-14</text:p>
          </table:table-cell>
          <table:table-cell office:value-type="float" office:value="48.15">
            <text:p>48.15</text:p>
          </table:table-cell>
          <table:table-cell office:value-type="string">
            <text:p>Tonsillite acuta</text:p>
          </table:table-cell>
          <table:table-cell office:value-type="float" office:value="320.00">
            <text:p>320.00</text:p>
          </table:table-cell>
        </table:table-row>
        <table:table-row>
          <table:table-cell office:value-type="string">
            <text:p>OSP019</text:p>
          </table:table-cell>
          <table:table-cell office:value-type="string">
            <text:p>RIC0000042</text:p>
          </table:table-cell>
          <table:table-cell office:value-type="string">
            <text:p>RZZGNN88E04H501N</text:p>
          </table:table-cell>
          <table:table-cell office:value-type="date" office:date-value="2024-06-18" table:style-name="DateCell">
            <text:p>2024-06-18</text:p>
          </table:table-cell>
          <table:table-cell office:value-type="float" office:value="144.40">
            <text:p>144.40</text:p>
          </table:table-cell>
          <table:table-cell office:value-type="string">
            <text:p>Calcoli alla colecisti</text:p>
          </table:table-cell>
          <table:table-cell office:value-type="float" office:value="1350.00">
            <text:p>1350.00</text:p>
          </table:table-cell>
        </table:table-row>
        <table:table-row>
          <table:table-cell office:value-type="string">
            <text:p>OSP013</text:p>
          </table:table-cell>
          <table:table-cell office:value-type="string">
            <text:p>RIC0000043</text:p>
          </table:table-cell>
          <table:table-cell office:value-type="string">
            <text:p>RNZMRC81A10A271D</text:p>
          </table:table-cell>
          <table:table-cell office:value-type="date" office:date-value="2024-06-22" table:style-name="DateCell">
            <text:p>2024-06-22</text:p>
          </table:table-cell>
          <table:table-cell office:value-type="float" office:value="72.25">
            <text:p>72.25</text:p>
          </table:table-cell>
          <table:table-cell office:value-type="string">
            <text:p>Sinusite cronica</text:p>
          </table:table-cell>
          <table:table-cell office:value-type="float" office:value="510.00">
            <text:p>510.00</text:p>
          </table:table-cell>
        </table:table-row>
        <table:table-row>
          <table:table-cell office:value-type="string">
            <text:p>OSP021</text:p>
          </table:table-cell>
          <table:table-cell office:value-type="string">
            <text:p>RIC0000044</text:p>
          </table:table-cell>
          <table:table-cell office:value-type="string">
            <text:p>TCCLRA86I18G273Z</text:p>
          </table:table-cell>
          <table:table-cell office:value-type="date" office:date-value="2024-06-26" table:style-name="DateCell">
            <text:p>2024-06-26</text:p>
          </table:table-cell>
          <table:table-cell office:value-type="float" office:value="192.50">
            <text:p>192.50</text:p>
          </table:table-cell>
          <table:table-cell office:value-type="string">
            <text:p>Artrite reumatoide acuta</text:p>
          </table:table-cell>
          <table:table-cell office:value-type="float" office:value="1940.00">
            <text:p>1940.00</text:p>
          </table:table-cell>
        </table:table-row>
        <table:table-row>
          <table:table-cell office:value-type="string">
            <text:p>OSP002</text:p>
          </table:table-cell>
          <table:table-cell office:value-type="string">
            <text:p>RIC0000045</text:p>
          </table:table-cell>
          <table:table-cell office:value-type="string">
            <text:p>SRTLRA78L29D612S</text:p>
          </table:table-cell>
          <table:table-cell office:value-type="date" office:date-value="2024-07-01" table:style-name="DateCell">
            <text:p>2024-07-01</text:p>
          </table:table-cell>
          <table:table-cell office:value-type="float" office:value="96.10">
            <text:p>96.10</text:p>
          </table:table-cell>
          <table:table-cell office:value-type="string">
            <text:p>Gastrite erosiva</text:p>
          </table:table-cell>
          <table:table-cell office:value-type="float" office:value="740.00">
            <text:p>740.00</text:p>
          </table:table-cell>
        </table:table-row>
        <table:table-row>
          <table:table-cell office:value-type="string">
            <text:p>OSP028</text:p>
          </table:table-cell>
          <table:table-cell office:value-type="string">
            <text:p>RIC0000046</text:p>
          </table:table-cell>
          <table:table-cell office:value-type="string">
            <text:p>FRRSFN92D04L736W</text:p>
          </table:table-cell>
          <table:table-cell office:value-type="date" office:date-value="2024-07-05" table:style-name="DateCell">
            <text:p>2024-07-05</text:p>
          </table:table-cell>
          <table:table-cell office:value-type="float" office:value="120.55">
            <text:p>120.55</text:p>
          </table:table-cell>
          <table:table-cell office:value-type="string">
            <text:p>Polmonite atipica</text:p>
          </table:table-cell>
          <table:table-cell office:value-type="float" office:value="1150.00">
            <text:p>1150.00</text:p>
          </table:table-cell>
        </table:table-row>
        <table:table-row>
          <table:table-cell office:value-type="string">
            <text:p>OSP006</text:p>
          </table:table-cell>
          <table:table-cell office:value-type="string">
            <text:p>RIC0000047</text:p>
          </table:table-cell>
          <table:table-cell office:value-type="string">
            <text:p>PRNNNA79L09F205I</text:p>
          </table:table-cell>
          <table:table-cell office:value-type="date" office:date-value="2024-07-09" table:style-name="DateCell">
            <text:p>2024-07-09</text:p>
          </table:table-cell>
          <table:table-cell office:value-type="float" office:value="48.20">
            <text:p>48.20</text:p>
          </table:table-cell>
          <table:table-cell office:value-type="string">
            <text:p>Trauma toracico</text:p>
          </table:table-cell>
          <table:table-cell office:value-type="float" office:value="380.00">
            <text:p>380.00</text:p>
          </table:table-cell>
        </table:table-row>
        <table:table-row>
          <table:table-cell office:value-type="string">
            <text:p>OSP022</text:p>
          </table:table-cell>
          <table:table-cell office:value-type="string">
            <text:p>RIC0000048</text:p>
          </table:table-cell>
          <table:table-cell office:value-type="string">
            <text:p>BTTNDR90A31A271V</text:p>
          </table:table-cell>
          <table:table-cell office:value-type="date" office:date-value="2024-07-13" table:style-name="DateCell">
            <text:p>2024-07-13</text:p>
          </table:table-cell>
          <table:table-cell office:value-type="float" office:value="216.35">
            <text:p>216.35</text:p>
          </table:table-cell>
          <table:table-cell office:value-type="string">
            <text:p>Peritonite acuta</text:p>
          </table:table-cell>
          <table:table-cell office:value-type="float" office:value="2750.00">
            <text:p>2750.00</text:p>
          </table:table-cell>
        </table:table-row>
        <table:table-row>
          <table:table-cell office:value-type="string">
            <text:p>OSP009</text:p>
          </table:table-cell>
          <table:table-cell office:value-type="string">
            <text:p>RIC0000049</text:p>
          </table:table-cell>
          <table:table-cell office:value-type="string">
            <text:p>CSTLCN69L30L736W</text:p>
          </table:table-cell>
          <table:table-cell office:value-type="date" office:date-value="2024-07-17" table:style-name="DateCell">
            <text:p>2024-07-17</text:p>
          </table:table-cell>
          <table:table-cell office:value-type="float" office:value="72.00">
            <text:p>72.00</text:p>
          </table:table-cell>
          <table:table-cell office:value-type="string">
            <text:p>Asma bronchiale acuta</text:p>
          </table:table-cell>
          <table:table-cell office:value-type="float" office:value="620.00">
            <text:p>620.00</text:p>
          </table:table-cell>
        </table:table-row>
        <table:table-row>
          <table:table-cell office:value-type="string">
            <text:p>OSP017</text:p>
          </table:table-cell>
          <table:table-cell office:value-type="string">
            <text:p>RIC0000050</text:p>
          </table:table-cell>
          <table:table-cell office:value-type="string">
            <text:p>SPNNDR79C12F839J</text:p>
          </table:table-cell>
          <table:table-cell office:value-type="date" office:date-value="2024-07-21" table:style-name="DateCell">
            <text:p>2024-07-21</text:p>
          </table:table-cell>
          <table:table-cell office:value-type="float" office:value="144.30">
            <text:p>144.30</text:p>
          </table:table-cell>
          <table:table-cell office:value-type="string">
            <text:p>Psoriasi grave</text:p>
          </table:table-cell>
          <table:table-cell office:value-type="float" office:value="1280.00">
            <text:p>1280.00</text:p>
          </table:table-cell>
        </table:table-row>
        <table:table-row>
          <table:table-cell office:value-type="string">
            <text:p>OSP010</text:p>
          </table:table-cell>
          <table:table-cell office:value-type="string">
            <text:p>RIC0000051</text:p>
          </table:table-cell>
          <table:table-cell office:value-type="string">
            <text:p>STFPTR89B11F205C</text:p>
          </table:table-cell>
          <table:table-cell office:value-type="date" office:date-value="2024-07-25" table:style-name="DateCell">
            <text:p>2024-07-25</text:p>
          </table:table-cell>
          <table:table-cell office:value-type="float" office:value="96.45">
            <text:p>96.45</text:p>
          </table:table-cell>
          <table:table-cell office:value-type="string">
            <text:p>Cistite emorragica</text:p>
          </table:table-cell>
          <table:table-cell office:value-type="float" office:value="830.00">
            <text:p>830.00</text:p>
          </table:table-cell>
        </table:table-row>
        <table:table-row>
          <table:table-cell office:value-type="string">
            <text:p>OSP004</text:p>
          </table:table-cell>
          <table:table-cell office:value-type="string">
            <text:p>RIC0000052</text:p>
          </table:table-cell>
          <table:table-cell office:value-type="string">
            <text:p>BRTGNN96L09D612E</text:p>
          </table:table-cell>
          <table:table-cell office:value-type="date" office:date-value="2024-07-29" table:style-name="DateCell">
            <text:p>2024-07-29</text:p>
          </table:table-cell>
          <table:table-cell office:value-type="float" office:value="168.20">
            <text:p>168.20</text:p>
          </table:table-cell>
          <table:table-cell office:value-type="string">
            <text:p>Occlusione intestinale</text:p>
          </table:table-cell>
          <table:table-cell office:value-type="float" office:value="1720.00">
            <text:p>1720.00</text:p>
          </table:table-cell>
        </table:table-row>
        <table:table-row>
          <table:table-cell office:value-type="string">
            <text:p>OSP031</text:p>
          </table:table-cell>
          <table:table-cell office:value-type="string">
            <text:p>RIC0000053</text:p>
          </table:table-cell>
          <table:table-cell office:value-type="string">
            <text:p>CPRPTR77C02L219T</text:p>
          </table:table-cell>
          <table:table-cell office:value-type="date" office:date-value="2024-08-02" table:style-name="DateCell">
            <text:p>2024-08-02</text:p>
          </table:table-cell>
          <table:table-cell office:value-type="float" office:value="48.05">
            <text:p>48.05</text:p>
          </table:table-cell>
          <table:table-cell office:value-type="string">
            <text:p>Cervicalgia acuta</text:p>
          </table:table-cell>
          <table:table-cell office:value-type="float" office:value="310.00">
            <text:p>310.00</text:p>
          </table:table-cell>
        </table:table-row>
        <table:table-row>
          <table:table-cell office:value-type="string">
            <text:p>OSP016</text:p>
          </table:table-cell>
          <table:table-cell office:value-type="string">
            <text:p>RIC0000054</text:p>
          </table:table-cell>
          <table:table-cell office:value-type="string">
            <text:p>GLLCST92D03F205K</text:p>
          </table:table-cell>
          <table:table-cell office:value-type="date" office:date-value="2024-08-06" table:style-name="DateCell">
            <text:p>2024-08-06</text:p>
          </table:table-cell>
          <table:table-cell office:value-type="float" office:value="240.50">
            <text:p>240.50</text:p>
          </table:table-cell>
          <table:table-cell office:value-type="string">
            <text:p>Miocardite</text:p>
          </table:table-cell>
          <table:table-cell office:value-type="float" office:value="3050.00">
            <text:p>3050.00</text:p>
          </table:table-cell>
        </table:table-row>
        <table:table-row>
          <table:table-cell office:value-type="string">
            <text:p>OSP005</text:p>
          </table:table-cell>
          <table:table-cell office:value-type="string">
            <text:p>RIC0000055</text:p>
          </table:table-cell>
          <table:table-cell office:value-type="string">
            <text:p>SLVMRC92A10G273H</text:p>
          </table:table-cell>
          <table:table-cell office:value-type="date" office:date-value="2024-08-10" table:style-name="DateCell">
            <text:p>2024-08-10</text:p>
          </table:table-cell>
          <table:table-cell office:value-type="float" office:value="72.15">
            <text:p>72.15</text:p>
          </table:table-cell>
          <table:table-cell office:value-type="string">
            <text:p>Rettocolite ulcerosa</text:p>
          </table:table-cell>
          <table:table-cell office:value-type="float" office:value="670.00">
            <text:p>670.00</text:p>
          </table:table-cell>
        </table:table-row>
        <table:table-row>
          <table:table-cell office:value-type="string">
            <text:p>OSP029</text:p>
          </table:table-cell>
          <table:table-cell office:value-type="string">
            <text:p>RIC0000056</text:p>
          </table:table-cell>
          <table:table-cell office:value-type="string">
            <text:p>ESPSRA87L10H501Q</text:p>
          </table:table-cell>
          <table:table-cell office:value-type="date" office:date-value="2024-08-14" table:style-name="DateCell">
            <text:p>2024-08-14</text:p>
          </table:table-cell>
          <table:table-cell office:value-type="float" office:value="120.40">
            <text:p>120.40</text:p>
          </table:table-cell>
          <table:table-cell office:value-type="string">
            <text:p>Nefrite interstiziale</text:p>
          </table:table-cell>
          <table:table-cell office:value-type="float" office:value="1120.00">
            <text:p>1120.00</text:p>
          </table:table-cell>
        </table:table-row>
        <table:table-row>
          <table:table-cell office:value-type="string">
            <text:p>OSP012</text:p>
          </table:table-cell>
          <table:table-cell office:value-type="string">
            <text:p>RIC0000057</text:p>
          </table:table-cell>
          <table:table-cell office:value-type="string">
            <text:p>TRNNNA75C12G273B</text:p>
          </table:table-cell>
          <table:table-cell office:value-type="date" office:date-value="2024-08-18" table:style-name="DateCell">
            <text:p>2024-08-18</text:p>
          </table:table-cell>
          <table:table-cell office:value-type="float" office:value="96.25">
            <text:p>96.25</text:p>
          </table:table-cell>
          <table:table-cell office:value-type="string">
            <text:p>Bursiti alla spalla</text:p>
          </table:table-cell>
          <table:table-cell office:value-type="float" office:value="760.00">
            <text:p>760.00</text:p>
          </table:table-cell>
        </table:table-row>
        <table:table-row>
          <table:table-cell office:value-type="string">
            <text:p>OSP027</text:p>
          </table:table-cell>
          <table:table-cell office:value-type="string">
            <text:p>RIC0000058</text:p>
          </table:table-cell>
          <table:table-cell office:value-type="string">
            <text:p>DMNGZZ80A11F205P</text:p>
          </table:table-cell>
          <table:table-cell office:value-type="date" office:date-value="2024-08-22" table:style-name="DateCell">
            <text:p>2024-08-22</text:p>
          </table:table-cell>
          <table:table-cell office:value-type="float" office:value="192.10">
            <text:p>192.10</text:p>
          </table:table-cell>
          <table:table-cell office:value-type="string">
            <text:p>Osteomielite</text:p>
          </table:table-cell>
          <table:table-cell office:value-type="float" office:value="2020.00">
            <text:p>2020.00</text:p>
          </table:table-cell>
        </table:table-row>
        <table:table-row>
          <table:table-cell office:value-type="string">
            <text:p>OSP020</text:p>
          </table:table-cell>
          <table:table-cell office:value-type="string">
            <text:p>RIC0000059</text:p>
          </table:table-cell>
          <table:table-cell office:value-type="string">
            <text:p>MNTTLR74D23D612U</text:p>
          </table:table-cell>
          <table:table-cell office:value-type="date" office:date-value="2024-08-26" table:style-name="DateCell">
            <text:p>2024-08-26</text:p>
          </table:table-cell>
          <table:table-cell office:value-type="float" office:value="72.35">
            <text:p>72.35</text:p>
          </table:table-cell>
          <table:table-cell office:value-type="string">
            <text:p>Angina instabile</text:p>
          </table:table-cell>
          <table:table-cell office:value-type="float" office:value="590.00">
            <text:p>590.00</text:p>
          </table:table-cell>
        </table:table-row>
        <table:table-row>
          <table:table-cell office:value-type="string">
            <text:p>OSP014</text:p>
          </table:table-cell>
          <table:table-cell office:value-type="string">
            <text:p>RIC0000060</text:p>
          </table:table-cell>
          <table:table-cell office:value-type="string">
            <text:p>TRTLLS94C02G273P</text:p>
          </table:table-cell>
          <table:table-cell office:value-type="date" office:date-value="2024-08-30" table:style-name="DateCell">
            <text:p>2024-08-30</text:p>
          </table:table-cell>
          <table:table-cell office:value-type="float" office:value="144.55">
            <text:p>144.55</text:p>
          </table:table-cell>
          <table:table-cell office:value-type="string">
            <text:p>Polimiosite</text:p>
          </table:table-cell>
          <table:table-cell office:value-type="float" office:value="1390.00">
            <text:p>1390.0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6-06-12T15:39:17+02:00</meta:creation-date>
  </office:meta>
</office:document-meta>
</file>